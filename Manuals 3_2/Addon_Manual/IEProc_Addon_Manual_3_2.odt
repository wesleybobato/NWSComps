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size="10pt" style:font-size-asian="10pt" style:font-size-complex="10pt"/>
    </style:style>
    <style:style style:name="P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size="10pt" officeooo:paragraph-rsid="00217935" style:font-size-asian="10pt" style:font-size-complex="10pt"/>
    </style:style>
    <style:style style:name="P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size="10pt" fo:font-weight="normal" style:font-size-asian="10pt" style:font-weight-asian="normal" style:font-size-complex="10pt" style:font-weight-complex="normal"/>
    </style:style>
    <style:style style:name="P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size="10pt" fo:font-weight="normal" officeooo:paragraph-rsid="00263a24" style:font-size-asian="10pt" style:font-weight-asian="normal" style:font-size-complex="10pt" style:font-weight-complex="normal"/>
    </style:style>
    <style:style style:name="P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size="10pt" fo:font-weight="normal" officeooo:paragraph-rsid="002d0630" style:font-size-asian="10pt" style:font-weight-asian="normal" style:font-size-complex="10pt" style:font-weight-complex="normal"/>
    </style:style>
    <style:style style:name="P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style:font-size-asian="10pt" style:font-weight-asian="bold" style:font-size-complex="10pt"/>
    </style:style>
    <style:style style:name="P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1dcc00" style:font-size-asian="10pt" style:font-weight-asian="bold" style:font-size-complex="10pt"/>
    </style:style>
    <style:style style:name="P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1f190c" style:font-size-asian="10pt" style:font-weight-asian="bold" style:font-size-complex="10pt"/>
    </style:style>
    <style:style style:name="P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263a24" style:font-size-asian="10pt" style:font-weight-asian="bold" style:font-size-complex="10pt"/>
    </style:style>
    <style:style style:name="P1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2d0630" style:font-size-asian="10pt" style:font-weight-asian="bold" style:font-size-complex="10pt"/>
    </style:style>
    <style:style style:name="P1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2d191e" style:font-size-asian="10pt" style:font-weight-asian="bold" style:font-size-complex="10pt"/>
    </style:style>
    <style:style style:name="P1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2fad96" style:font-size-asian="10pt" style:font-weight-asian="bold" style:font-size-complex="10pt"/>
    </style:style>
    <style:style style:name="P1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384e98" style:font-size-asian="10pt" style:font-weight-asian="bold" style:font-size-complex="10pt"/>
    </style:style>
    <style:style style:name="P1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38ff1f" style:font-size-asian="10pt" style:font-weight-asian="bold" style:font-size-complex="10pt"/>
    </style:style>
    <style:style style:name="P1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421b51" style:font-size-asian="10pt" style:font-weight-asian="bold" style:font-size-complex="10pt"/>
    </style:style>
    <style:style style:name="P1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1d4e0b" officeooo:paragraph-rsid="001d4e0b" style:font-size-asian="10pt" style:font-weight-asian="bold" style:font-size-complex="10pt"/>
    </style:style>
    <style:style style:name="P1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2d191e" officeooo:paragraph-rsid="002fad96" style:font-size-asian="10pt" style:font-weight-asian="bold" style:font-size-complex="10pt" style:font-weight-complex="normal"/>
    </style:style>
    <style:style style:name="P1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2fad96" officeooo:paragraph-rsid="002fad96" style:font-size-asian="10pt" style:font-weight-asian="bold" style:font-size-complex="10pt" style:font-weight-complex="bold"/>
    </style:style>
    <style:style style:name="P1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2fad96" officeooo:paragraph-rsid="00316dc8" style:font-size-asian="10pt" style:font-weight-asian="bold" style:font-size-complex="10pt" style:font-weight-complex="bold"/>
    </style:style>
    <style:style style:name="P2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233741" style:font-size-asian="10pt" style:font-weight-asian="bold" style:font-size-complex="10pt" style:font-weight-complex="bold"/>
    </style:style>
    <style:style style:name="P2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421b51" officeooo:paragraph-rsid="00421b51" style:font-size-asian="10pt" style:font-weight-asian="bold" style:font-size-complex="10pt"/>
    </style:style>
    <style:style style:name="P2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style:font-size-asian="10pt" style:font-weight-asian="normal" style:font-size-complex="10pt" style:font-weight-complex="normal"/>
    </style:style>
    <style:style style:name="P2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1dcc00" style:font-size-asian="10pt" style:font-weight-asian="normal" style:font-size-complex="10pt" style:font-weight-complex="normal"/>
    </style:style>
    <style:style style:name="P2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233741" style:font-size-asian="10pt" style:font-weight-asian="normal" style:font-size-complex="10pt" style:font-weight-complex="normal"/>
    </style:style>
    <style:style style:name="P2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2c788a" style:font-size-asian="10pt" style:font-weight-asian="normal" style:font-size-complex="10pt" style:font-weight-complex="normal"/>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2d191e" style:font-size-asian="10pt" style:font-weight-asian="normal" style:font-size-complex="10pt" style:font-weight-complex="normal"/>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384e98" style:font-size-asian="10pt" style:font-weight-asian="normal" style:font-size-complex="10pt" style:font-weight-complex="normal"/>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3a397d" style:font-size-asian="10pt" style:font-weight-asian="normal" style:font-size-complex="10pt" style:font-weight-complex="normal"/>
    </style:style>
    <style:style style:name="P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paragraph-rsid="003f4d10" style:font-size-asian="10pt" style:font-weight-asian="normal" style:font-size-complex="10pt" style:font-weight-complex="normal"/>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1f190c" officeooo:paragraph-rsid="001f190c"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1f816c" officeooo:paragraph-rsid="001f816c"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17935" officeooo:paragraph-rsid="00217935"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63a24" officeooo:paragraph-rsid="00263a24" style:font-size-asian="10pt" style:font-weight-asian="normal" style:font-size-complex="10pt" style:font-weight-complex="normal"/>
    </style:style>
    <style:style style:name="P3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63a24" officeooo:paragraph-rsid="002d0630" style:font-size-asian="10pt" style:font-weight-asian="normal" style:font-size-complex="10pt" style:font-weight-complex="normal"/>
    </style:style>
    <style:style style:name="P3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0630" officeooo:paragraph-rsid="002d0630" style:font-size-asian="10pt" style:font-weight-asian="normal" style:font-size-complex="10pt" style:font-weight-complex="normal"/>
    </style:style>
    <style:style style:name="P3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c788a" officeooo:paragraph-rsid="002c788a" style:font-size-asian="10pt" style:font-weight-asian="normal" style:font-size-complex="10pt" style:font-weight-complex="normal"/>
    </style:style>
    <style:style style:name="P3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191e" officeooo:paragraph-rsid="002d191e" style:font-size-asian="10pt" style:font-weight-asian="normal" style:font-size-complex="10pt" style:font-weight-complex="normal"/>
    </style:style>
    <style:style style:name="P3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191e" officeooo:paragraph-rsid="00384e98"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191e" officeooo:paragraph-rsid="0038ff1f" style:font-size-asian="10pt" style:font-weight-asian="normal" style:font-size-complex="10pt" style:font-weight-complex="normal"/>
    </style:style>
    <style:style style:name="P4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fad96" officeooo:paragraph-rsid="002fad96" style:font-size-asian="10pt" style:font-weight-asian="normal" style:font-size-complex="10pt" style:font-weight-complex="normal"/>
    </style:style>
    <style:style style:name="P4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fad96" officeooo:paragraph-rsid="00316dc8" style:font-size-asian="10pt" style:font-weight-asian="normal" style:font-size-complex="10pt" style:font-weight-complex="normal"/>
    </style:style>
    <style:style style:name="P4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fad96" officeooo:paragraph-rsid="00345940" style:font-size-asian="10pt" style:font-weight-asian="normal" style:font-size-complex="10pt" style:font-weight-complex="normal"/>
    </style:style>
    <style:style style:name="P4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316dc8" officeooo:paragraph-rsid="00316dc8" style:font-size-asian="10pt" style:font-weight-asian="normal" style:font-size-complex="10pt" style:font-weight-complex="normal"/>
    </style:style>
    <style:style style:name="P4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335a9b" officeooo:paragraph-rsid="00335a9b" style:font-size-asian="10pt" style:font-weight-asian="normal" style:font-size-complex="10pt" style:font-weight-complex="normal"/>
    </style:style>
    <style:style style:name="P4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335a9b" officeooo:paragraph-rsid="00345940" style:font-size-asian="10pt" style:font-weight-asian="normal" style:font-size-complex="10pt" style:font-weight-complex="normal"/>
    </style:style>
    <style:style style:name="P4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345940" officeooo:paragraph-rsid="00345940" style:font-size-asian="10pt" style:font-weight-asian="normal" style:font-size-complex="10pt" style:font-weight-complex="normal"/>
    </style:style>
    <style:style style:name="P4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35514e" officeooo:paragraph-rsid="0035514e" style:font-size-asian="10pt" style:font-weight-asian="normal" style:font-size-complex="10pt" style:font-weight-complex="normal"/>
    </style:style>
    <style:style style:name="P4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style:font-size-asian="10pt" style:font-weight-asian="normal" style:font-size-complex="10pt"/>
    </style:style>
    <style:style style:name="P4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2pt" fo:font-weight="bold" style:font-size-asian="12pt" style:font-weight-asian="bold" style:font-size-complex="12pt"/>
    </style:style>
    <style:style style:name="P5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2pt" fo:font-weight="bold" officeooo:paragraph-rsid="001f190c" style:font-size-asian="12pt" style:font-weight-asian="bold" style:font-size-complex="12pt"/>
    </style:style>
    <style:style style:name="P5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2pt" fo:font-weight="bold" officeooo:paragraph-rsid="002fad96" style:font-size-asian="12pt" style:font-weight-asian="bold" style:font-size-complex="12pt"/>
    </style:style>
    <style:style style:name="P5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2pt" fo:font-weight="bold" officeooo:rsid="00335a9b" officeooo:paragraph-rsid="00335a9b" style:font-size-asian="12pt" style:font-weight-asian="bold" style:font-size-complex="12pt" style:font-weight-complex="bold"/>
    </style:style>
    <style:style style:name="P5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style:font-size-asian="11pt" style:font-weight-asian="bold" style:font-size-complex="11pt"/>
    </style:style>
    <style:style style:name="P5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officeooo:paragraph-rsid="0023216d" style:font-size-asian="11pt" style:font-weight-asian="bold" style:font-size-complex="11pt"/>
    </style:style>
    <style:style style:name="P5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officeooo:paragraph-rsid="00233741" style:font-size-asian="11pt" style:font-weight-asian="bold" style:font-size-complex="11pt"/>
    </style:style>
    <style:style style:name="P5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style:font-size-asian="11pt" style:font-weight-asian="bold" style:font-size-complex="11pt" style:font-weight-complex="bold"/>
    </style:style>
    <style:style style:name="P57" style:family="paragraph" style:parent-style-name="Standard">
      <loext:graphic-properties draw:fill="none"/>
      <style:paragraph-properties fo:text-align="start" style:justify-single-word="false" fo:background-color="transparent"/>
      <style:text-properties fo:color="#00000a" style:font-name="Arial" fo:font-size="10pt" fo:font-weight="bold" style:font-size-asian="10pt" style:font-weight-asian="bold" style:font-size-complex="10pt"/>
    </style:style>
    <style:style style:name="P58" style:family="paragraph" style:parent-style-name="Standard" style:master-page-name="Standard">
      <loext:graphic-properties draw:fill="none"/>
      <style:paragraph-properties fo:margin-left="0cm" fo:margin-right="-1.199cm" fo:text-align="start" style:justify-single-word="false" fo:text-indent="0cm" style:auto-text-indent="false" style:page-number="auto" fo:background-color="transparent"/>
      <style:text-properties fo:color="#00000a" style:font-name="Arial" fo:font-size="10pt" fo:font-weight="bold" style:font-size-asian="10pt" style:font-weight-asian="bold" style:font-size-complex="10pt"/>
    </style:style>
    <style:style style:name="P5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0630" officeooo:paragraph-rsid="002d0630" style:font-size-asian="10pt" style:font-weight-asian="normal" style:font-size-complex="10pt" style:font-weight-complex="normal"/>
    </style:style>
    <style:style style:name="P6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0630" officeooo:paragraph-rsid="0042c09d" style:font-size-asian="10pt" style:font-weight-asian="normal" style:font-size-complex="10pt" style:font-weight-complex="normal"/>
    </style:style>
    <style:style style:name="P6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0630" officeooo:paragraph-rsid="00437db8" style:font-size-asian="10pt" style:font-weight-asian="normal" style:font-size-complex="10pt" style:font-weight-complex="normal"/>
    </style:style>
    <style:style style:name="P6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d0630" officeooo:paragraph-rsid="0045da48" style:font-size-asian="10pt" style:font-weight-asian="normal" style:font-size-complex="10pt" style:font-weight-complex="normal"/>
    </style:style>
    <style:style style:name="P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42c09d" officeooo:paragraph-rsid="0042c09d" style:font-size-asian="10pt" style:font-weight-asian="normal" style:font-size-complex="10pt" style:font-weight-complex="normal"/>
    </style:style>
    <style:style style:name="P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style:font-size-asian="10pt" style:font-weight-asian="normal" style:font-size-complex="10pt" style:font-weight-complex="normal"/>
    </style:style>
    <style:style style:name="P6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263a24" officeooo:paragraph-rsid="002d0630" style:font-size-asian="10pt" style:font-weight-asian="normal" style:font-size-complex="10pt" style:font-weight-complex="normal"/>
    </style:style>
    <style:style style:name="P6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437db8" officeooo:paragraph-rsid="00437db8" style:font-size-asian="10pt" style:font-weight-asian="normal" style:font-size-complex="10pt" style:font-weight-complex="normal"/>
    </style:style>
    <style:style style:name="P6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normal" officeooo:rsid="00447b12" officeooo:paragraph-rsid="00447b12" style:font-size-asian="10pt" style:font-weight-asian="normal" style:font-size-complex="10pt" style:font-weight-complex="normal"/>
    </style:style>
    <style:style style:name="P6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42c09d" officeooo:paragraph-rsid="0042c09d" style:font-size-asian="10pt" style:font-weight-asian="bold" style:font-size-complex="10pt" style:font-weight-complex="normal"/>
    </style:style>
    <style:style style:name="P6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437db8" officeooo:paragraph-rsid="00437db8" style:font-size-asian="10pt" style:font-weight-asian="bold" style:font-size-complex="10pt" style:font-weight-complex="bold"/>
    </style:style>
    <style:style style:name="P7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officeooo:paragraph-rsid="0042c09d" style:font-size-asian="11pt" style:font-weight-asian="bold" style:font-size-complex="11pt"/>
    </style:style>
    <style:style style:name="P7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officeooo:rsid="00263a24" officeooo:paragraph-rsid="002d0630" style:font-size-asian="11pt" style:font-weight-asian="bold" style:font-size-complex="11pt" style:font-weight-complex="bold"/>
    </style:style>
    <style:style style:name="P7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1pt" fo:font-weight="bold" officeooo:rsid="00437db8" officeooo:paragraph-rsid="00437db8" style:font-size-asian="11pt" style:font-weight-asian="bold" style:font-size-complex="11pt" style:font-weight-complex="bold"/>
    </style:style>
    <style:style style:name="P73" style:family="paragraph" style:parent-style-name="Standard" style:list-style-name="L1">
      <loext:graphic-properties draw:fill="none"/>
      <style:paragraph-properties fo:text-align="start" style:justify-single-word="false" fo:background-color="transparent"/>
      <style:text-properties fo:font-size="10pt" fo:font-weight="normal" style:font-size-asian="10pt" style:font-weight-asian="normal" style:font-size-complex="10pt" style:font-weight-complex="normal"/>
    </style:style>
    <style:style style:name="P74" style:family="paragraph" style:parent-style-name="Standard" style:list-style-name="L3">
      <loext:graphic-properties draw:fill="none"/>
      <style:paragraph-properties fo:text-align="start" style:justify-single-word="false" fo:background-color="transparent"/>
      <style:text-properties fo:font-size="10pt" fo:font-weight="normal" style:font-size-asian="10pt" style:font-weight-asian="normal" style:font-size-complex="10pt" style:font-weight-complex="normal"/>
    </style:style>
    <style:style style:name="P75" style:family="paragraph" style:parent-style-name="Standard" style:list-style-name="L4">
      <loext:graphic-properties draw:fill="none"/>
      <style:paragraph-properties fo:text-align="start" style:justify-single-word="false" fo:background-color="transparent"/>
      <style:text-properties fo:font-size="10pt" fo:font-weight="normal" style:font-size-asian="10pt" style:font-weight-asian="normal" style:font-size-complex="10pt" style:font-weight-complex="normal"/>
    </style:style>
    <style:style style:name="P76" style:family="paragraph" style:parent-style-name="Standard" style:list-style-name="L1">
      <loext:graphic-properties draw:fill="none"/>
      <style:paragraph-properties fo:text-align="start" style:justify-single-word="false" fo:background-color="transparent"/>
      <style:text-properties fo:color="#00000a" style:font-name="Arial" fo:font-size="10pt" fo:font-weight="normal" officeooo:rsid="001d4e0b" officeooo:paragraph-rsid="001d4e0b" style:font-size-asian="10pt" style:font-weight-asian="normal" style:font-size-complex="10pt" style:font-weight-complex="normal"/>
    </style:style>
    <style:style style:name="P77" style:family="paragraph" style:parent-style-name="Standard" style:list-style-name="L1">
      <loext:graphic-properties draw:fill="none"/>
      <style:paragraph-properties fo:text-align="start" style:justify-single-word="false" fo:background-color="transparent"/>
      <style:text-properties fo:color="#00000a" style:font-name="Arial" fo:font-size="10pt" fo:font-weight="normal" officeooo:rsid="002aaa2a" officeooo:paragraph-rsid="002aaa2a" style:font-size-asian="10pt" style:font-weight-asian="normal" style:font-size-complex="10pt" style:font-weight-complex="normal"/>
    </style:style>
    <style:style style:name="P78" style:family="paragraph" style:parent-style-name="Standard" style:list-style-name="L1">
      <loext:graphic-properties draw:fill="none"/>
      <style:paragraph-properties fo:text-align="start" style:justify-single-word="false" fo:background-color="transparent"/>
      <style:text-properties fo:color="#00000a" style:font-name="Arial" fo:font-size="10pt" fo:font-weight="normal" officeooo:rsid="002be312" officeooo:paragraph-rsid="002be312" style:font-size-asian="10pt" style:font-weight-asian="normal" style:font-size-complex="10pt" style:font-weight-complex="normal"/>
    </style:style>
    <style:style style:name="P79" style:family="paragraph" style:parent-style-name="Standard" style:list-style-name="L1">
      <loext:graphic-properties draw:fill="none"/>
      <style:paragraph-properties fo:text-align="start" style:justify-single-word="false" fo:background-color="transparent"/>
      <style:text-properties fo:color="#00000a" style:font-name="Arial" fo:font-size="10pt" fo:font-weight="normal" officeooo:rsid="002eb564" officeooo:paragraph-rsid="002eb564" style:font-size-asian="10pt" style:font-weight-asian="normal" style:font-size-complex="10pt" style:font-weight-complex="normal"/>
    </style:style>
    <style:style style:name="P80" style:family="paragraph" style:parent-style-name="Standard" style:list-style-name="L2">
      <loext:graphic-properties draw:fill="none"/>
      <style:paragraph-properties fo:text-align="start" style:justify-single-word="false" fo:background-color="transparent"/>
      <style:text-properties fo:color="#00000a" style:font-name="Arial" fo:font-size="10pt" fo:font-weight="normal" officeooo:rsid="001f190c" officeooo:paragraph-rsid="001f190c" style:font-size-asian="10pt" style:font-weight-asian="normal" style:font-size-complex="10pt" style:font-weight-complex="normal"/>
    </style:style>
    <style:style style:name="P81" style:family="paragraph" style:parent-style-name="Standard" style:list-style-name="L3">
      <loext:graphic-properties draw:fill="none"/>
      <style:paragraph-properties fo:text-align="start" style:justify-single-word="false" fo:background-color="transparent"/>
      <style:text-properties fo:color="#00000a" style:font-name="Arial" fo:font-size="10pt" fo:font-weight="normal" style:font-size-asian="10pt" style:font-weight-asian="normal" style:font-size-complex="10pt" style:font-weight-complex="normal"/>
    </style:style>
    <style:style style:name="T1" style:family="text">
      <style:text-properties fo:color="#00000a" style:font-name="Arial"/>
    </style:style>
    <style:style style:name="T2" style:family="text">
      <style:text-properties fo:color="#00000a" style:font-name="Arial" fo:font-size="11pt" fo:font-weight="bold" style:font-size-asian="11pt" style:font-weight-asian="bold" style:font-size-complex="11pt"/>
    </style:style>
    <style:style style:name="T3" style:family="text">
      <style:text-properties fo:color="#00000a" style:font-name="Arial" fo:font-weight="bold" style:font-weight-asian="bold"/>
    </style:style>
    <style:style style:name="T4" style:family="text">
      <style:text-properties fo:color="#00000a" style:font-name="Arial" fo:font-weight="bold" officeooo:rsid="001d4e0b" style:font-weight-asian="bold"/>
    </style:style>
    <style:style style:name="T5" style:family="text">
      <style:text-properties fo:color="#00000a" style:font-name="Arial" fo:font-weight="bold" officeooo:rsid="00217935" style:font-weight-asian="bold"/>
    </style:style>
    <style:style style:name="T6" style:family="text">
      <style:text-properties fo:color="#00000a" style:font-name="Arial" fo:font-weight="bold" style:font-weight-asian="bold" style:font-weight-complex="normal"/>
    </style:style>
    <style:style style:name="T7" style:family="text">
      <style:text-properties fo:color="#00000a" style:font-name="Arial" fo:font-weight="bold" style:font-weight-asian="bold" style:font-weight-complex="bold"/>
    </style:style>
    <style:style style:name="T8" style:family="text">
      <style:text-properties fo:color="#00000a" style:font-name="Arial" officeooo:rsid="001d4e0b"/>
    </style:style>
    <style:style style:name="T9" style:family="text">
      <style:text-properties fo:color="#00000a" style:font-name="Arial" fo:font-weight="normal" style:font-weight-asian="normal" style:font-weight-complex="normal"/>
    </style:style>
    <style:style style:name="T10" style:family="text">
      <style:text-properties fo:color="#00000a" style:font-name="Arial" fo:font-weight="normal" officeooo:rsid="00217935" style:font-weight-asian="normal" style:font-weight-complex="normal"/>
    </style:style>
    <style:style style:name="T11" style:family="text">
      <style:text-properties fo:color="#00000a" style:font-name="Arial" fo:font-weight="normal" officeooo:rsid="003da1c2" style:font-weight-asian="normal" style:font-weight-complex="normal"/>
    </style:style>
    <style:style style:name="T12" style:family="text">
      <style:text-properties fo:color="#00000a" style:font-name="Arial" fo:font-weight="normal" officeooo:rsid="003df44a" style:font-weight-asian="normal" style:font-weight-complex="normal"/>
    </style:style>
    <style:style style:name="T13" style:family="text">
      <style:text-properties fo:color="#00000a" style:font-name="Arial" fo:font-weight="normal" officeooo:rsid="003f4d10" style:font-weight-asian="normal" style:font-weight-complex="normal"/>
    </style:style>
    <style:style style:name="T14" style:family="text">
      <style:text-properties fo:color="#00000a" style:font-name="Arial" officeooo:rsid="001f0e12"/>
    </style:style>
    <style:style style:name="T15" style:family="text">
      <style:text-properties fo:color="#00000a" style:font-name="Arial" officeooo:rsid="00217935"/>
    </style:style>
    <style:style style:name="T16" style:family="text">
      <style:text-properties fo:color="#00000a" style:font-name="Arial" officeooo:rsid="00233741"/>
    </style:style>
    <style:style style:name="T17" style:family="text">
      <style:text-properties fo:color="#00000a" style:font-name="Arial" officeooo:rsid="00263a24"/>
    </style:style>
    <style:style style:name="T18" style:family="text">
      <style:text-properties fo:color="#00000a" style:font-name="Arial" officeooo:rsid="002c788a"/>
    </style:style>
    <style:style style:name="T19" style:family="text">
      <style:text-properties officeooo:rsid="002be312"/>
    </style:style>
    <style:style style:name="T20" style:family="text">
      <style:text-properties officeooo:rsid="002d0630"/>
    </style:style>
    <style:style style:name="T21" style:family="text">
      <style:text-properties officeooo:rsid="002d191e"/>
    </style:style>
    <style:style style:name="T22" style:family="text">
      <style:text-properties officeooo:rsid="002eb564"/>
    </style:style>
    <style:style style:name="T23" style:family="text">
      <style:text-properties officeooo:rsid="002fad96"/>
    </style:style>
    <style:style style:name="T24" style:family="text">
      <style:text-properties officeooo:rsid="00316dc8"/>
    </style:style>
    <style:style style:name="T25" style:family="text">
      <style:text-properties fo:font-weight="bold" style:font-weight-asian="bold" style:font-weight-complex="bold"/>
    </style:style>
    <style:style style:name="T26" style:family="text">
      <style:text-properties fo:font-weight="bold" officeooo:rsid="003a397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officeooo:rsid="0031b9f8"/>
    </style:style>
    <style:style style:name="T29" style:family="text">
      <style:text-properties officeooo:rsid="0037cfda"/>
    </style:style>
    <style:style style:name="T30" style:family="text">
      <style:text-properties officeooo:rsid="00384e98"/>
    </style:style>
    <style:style style:name="T31" style:family="text">
      <style:text-properties officeooo:rsid="003f4d10"/>
    </style:style>
    <style:style style:name="T32" style:family="text">
      <style:text-properties officeooo:rsid="00404f6e"/>
    </style:style>
    <style:style style:name="T33" style:family="text">
      <style:text-properties style:font-weight-complex="normal"/>
    </style:style>
    <style:style style:name="T34" style:family="text">
      <style:text-properties officeooo:rsid="004188e4" style:font-weight-complex="normal"/>
    </style:style>
    <style:style style:name="T35" style:family="text">
      <style:text-properties officeooo:rsid="0041ccfa"/>
    </style:style>
    <style:style style:name="T36" style:family="text">
      <style:text-properties officeooo:rsid="00263a24"/>
    </style:style>
    <style:style style:name="T37" style:family="text">
      <style:text-properties officeooo:rsid="0045da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Image Processing Addon</text:p>
      <text:p text:style-name="P6">Bundle 3.2</text:p>
      <text:p text:style-name="P6"/>
      <text:p text:style-name="P6">Author: Francesco Savastano</text:p>
      <text:p text:style-name="P6">Email: <text:s/><text:a xlink:type="simple" xlink:href="mailto:nwscomps@gmail.com" text:style-name="Internet_20_link" text:visited-style-name="Visited_20_Internet_20_Link">nwscomps@gmail.com</text:a></text:p>
      <text:p text:style-name="P21">WebSite: <text:a xlink:type="simple" xlink:href="http://fssoft.it/delphicomps.html" text:style-name="Internet_20_link" text:visited-style-name="Visited_20_Internet_20_Link">http://fssoft.it/delphicomps.html</text:a></text:p>
      <text:p text:style-name="P15"/>
      <text:p text:style-name="P6"/>
      <text:p text:style-name="P49">Class TIEProc_EX</text:p>
      <text:p text:style-name="P6"/>
      <text:p text:style-name="P6">TImageenproc ← TIEProc_EX</text:p>
      <text:p text:style-name="P6">Declared in Unit NWSComps_Proc</text:p>
      <text:p text:style-name="P6"/>
      <text:p text:style-name="P1"><text:span text:style-name="T3">What’s new in v.3.</text:span><text:span text:style-name="T4">2</text:span><text:span text:style-name="T3">:</text:span></text:p>
      <text:p text:style-name="P6"/>
      <text:list xml:id="list3060037546" text:style-name="L1">
        <text:list-item>
          <text:p text:style-name="P73"><text:span text:style-name="T1">We have </text:span><text:span text:style-name="T8">further improved the speed of the preview of the most time-consuming filters</text:span><text:span text:style-name="T1">. </text:span></text:p>
        </text:list-item>
        <text:list-item>
          <text:p text:style-name="P76"><text:span text:style-name="T22">New</text:span> TIEProc_EX_FiltersPanel that will build automatically the GUI to preview and apply the filters, including all sliders, checkboxes etc..you do not have to build anymore the user interface for the filters</text:p>
        </text:list-item>
        <text:list-item>
          <text:p text:style-name="P76">We have solved some issues that could in some case <text:span text:style-name="T19">give problems</text:span> with the preview</text:p>
        </text:list-item>
        <text:list-item>
          <text:p text:style-name="P76">We have adapted the component to work best with the latest version of ImageEn</text:p>
        </text:list-item>
        <text:list-item>
          <text:p text:style-name="P77"><text:span text:style-name="T22">A</text:span>dded a Color Filter, to apply a Color with different blend modes</text:p>
        </text:list-item>
        <text:list-item>
          <text:p text:style-name="P78"><text:span text:style-name="T22">A</text:span>dded a Bilateral Filter (denoising)</text:p>
        </text:list-item>
        <text:list-item>
          <text:p text:style-name="P79">Added <text:span text:style-name="T35">several other </text:span>imageEn <text:span text:style-name="T35">filter such as </text:span>Median Filter (<text:span text:style-name="T35">in Median and </text:span>Sharpen Mode) <text:span text:style-name="T35">and</text:span> <text:span text:style-name="T35">Sharpen</text:span></text:p>
        </text:list-item>
      </text:list>
      <text:p text:style-name="P16"><text:s/></text:p>
      <text:p text:style-name="P6"/>
      <text:p text:style-name="P49">Description </text:p>
      <text:p text:style-name="P6"/>
      <text:p text:style-name="P6">TIEProc_EX is a visual component (descendant from TImageEnProc).</text:p>
      <text:p text:style-name="P6"/>
      <text:p text:style-name="P22">It has been designed with the aim of extending the native collection of imageEn filters, and providing real time preview for both its own filters and the native ImageEn filters. Furthermore, starting from v.3 of our bundle the component supports MultiThreaded Processing in order to maximize the use of modern computer cpus.</text:p>
      <text:p text:style-name="P6"/>
      <text:p text:style-name="P6">The ImageEn graphics library is needed to use all our components, and you can purchase it here: www.imageen.com</text:p>
      <text:p text:style-name="P6"/>
      <text:p text:style-name="P6">Features:</text:p>
      <text:p text:style-name="P6"/>
      <text:p text:style-name="P1"><text:span text:style-name="T3"><text:s/></text:span><text:span text:style-name="T9">You can use the component just as a normal TimagenProc, by setting its AttachedIEBitmap, or AttachedImageenview and call its methods exactly as in Timageenproc.</text:span><text:span text:style-name="T3"> </text:span></text:p>
      <text:p text:style-name="P1"/>
      <text:p text:style-name="P1"><text:span text:style-name="T3"><text:s/></text:span><text:span text:style-name="T9">The advantage over a normal Timageenproc is that you can use multithreaded processing (</text:span><text:span text:style-name="T12">25</text:span><text:span text:style-name="T9"> ImageEn filters </text:span><text:span text:style-name="T12">support multithread). You can use</text:span><text:span text:style-name="T9"> custom filters </text:span><text:span text:style-name="T12">to encapsulate your own filter or imageEn filters that are not currently supported yet (see the demo on how to create a custom filter)</text:span><text:span text:style-name="T9">.</text:span></text:p>
      <text:p text:style-name="P22"/>
      <text:p text:style-name="P29">When multithreading is not supported, the single-threaded processing will be used automatically. You can enable / disable multithreading at the component level, or if you want to define your own rule at the filter level you can use the provided <text:s/>OnFilter_CustomMultithreadInfo event. </text:p>
      <text:p text:style-name="P6"/>
      <text:p text:style-name="P1"><text:span text:style-name="T3"><text:s/></text:span><text:span text:style-name="T9">You can create filters / collection of filters, either from our predefined supported types that includes </text:span><text:span text:style-name="T12">28</text:span><text:span text:style-name="T9"> native imageEn filter</text:span><text:span text:style-name="T13">s</text:span><text:span text:style-name="T9">, or from your own custom filters </text:span><text:span text:style-name="T11">(see the demo project)</text:span><text:span text:style-name="T9">. You can apply a single filter or a collection of filters, in the same way you would do using a Timageenproc, thanks to the Process_Apply method. </text:span></text:p>
      <text:p text:style-name="P6"><text:soft-page-break/></text:p>
      <text:p text:style-name="P25"><text:s/>Using the advanced approach <text:span text:style-name="T32">with</text:span> filters you can preview any filter / collection of filters in real time. Filters can be easily previewed in real time on any TImageEnView component. All you have to do, is to call the Preview_Register method to register the component together with the display (TImageEnView) and with the Filter or Collection of filters you want to preview. </text:p>
      <text:p text:style-name="P25"/>
      <text:p text:style-name="P36">The new Filter Panel component builds the GUI for the filters automatically (no more adding trackbars, checkboxes etc.. to your project, all is done by this component)</text:p>
      <text:p text:style-name="P6"/>
      <text:p text:style-name="P22">During the preview the user will be able to change the filters parameters and the preview will be refreshed. Then you can apply the preview, just calling a method of the component (Preview_Apply). The demo <text:span text:style-name="T31">project </text:span>shows how to do that with minimal coding. </text:p>
      <text:p text:style-name="P6"/>
      <text:p text:style-name="P22">The preview will work on the currently selected layer in TImageEnView. If you change the current layer, the preview also switches automatically on the new layer. The preview will take also into account any selection that is present in the ImageEnView component. And it will be refreshed automatically each time there is a change to the display (zoom, pan, etc..). This is done completely automatically, you do not have to write any code, except registering TIEProc_Ex with your Timageenview by a single method call. </text:p>
      <text:p text:style-name="P6"/>
      <text:p text:style-name="P3"><text:span text:style-name="T1"><text:s/>All other </text:span><text:span text:style-name="T18">not-included</text:span><text:span text:style-name="T1"> ImageEn filters can </text:span><text:span text:style-name="T14">be</text:span><text:span text:style-name="T1"> preview</text:span><text:span text:style-name="T14">ed</text:span><text:span text:style-name="T1"> or </text:span><text:span text:style-name="T14">you can</text:span><text:span text:style-name="T1"> add multithreading support to them </text:span><text:span text:style-name="T14">but</text:span><text:span text:style-name="T1"> you have to encapsulate them into custom filters. Several examples of custom filters are offered in the demo project. </text:span></text:p>
      <text:p text:style-name="P22"/>
      <text:p text:style-name="P48"><text:span text:style-name="T34">TIEProc_EX i</text:span><text:span text:style-name="T33">ncludes </text:span><text:span text:style-name="T34">also </text:span><text:span text:style-name="T33">our own filters that are not present in ImageEn such as: </text:span></text:p>
      <text:p text:style-name="P1"><text:span text:style-name="T9">Smart Flash, Reduce Highlights, Fill-Back Light, Smart Contrast. These can be both previewed and applied as all the other filters.</text:span><text:span text:style-name="T3"> </text:span></text:p>
      <text:p text:style-name="P6"/>
      <text:p text:style-name="P23">Using custom filters, you can now use TIEProc_EX together with our TRGBCurves component. An example is provided in the demo project.</text:p>
      <text:p text:style-name="P7"><text:s/></text:p>
      <text:p text:style-name="P49">Technical Reference</text:p>
      <text:p text:style-name="P6"/>
      <text:p text:style-name="P6">UNITS:</text:p>
      <text:p text:style-name="P6"/>
      <text:p text:style-name="P6">NWSComps_Proc.pas</text:p>
      <text:p text:style-name="P6"/>
      <text:p text:style-name="P22">Contains the main class TIEProc_Ex that is derived from TImageEnProc</text:p>
      <text:p text:style-name="P6"/>
      <text:p text:style-name="P6">NWSComps_Proc_Engine.pas</text:p>
      <text:p text:style-name="P6"/>
      <text:p text:style-name="P22">Contains the classes and functions of the image processing engine.</text:p>
      <text:p text:style-name="P6"/>
      <text:p text:style-name="P6">NWSComps_Proc_Filter_Types.pas</text:p>
      <text:p text:style-name="P6"/>
      <text:p text:style-name="P22">Contains the general classes for filters and filters collections.</text:p>
      <text:p text:style-name="P6"/>
      <text:p text:style-name="P6">NWSComps_Proc_Filter_Lib</text:p>
      <text:p text:style-name="P6"/>
      <text:p text:style-name="P22">Contains the specific classes for the kind of filters actually supported.</text:p>
      <text:p text:style-name="P6"/>
      <text:p text:style-name="P6">NWSComps_Proc_Filter_Lib_const.pas</text:p>
      <text:p text:style-name="P6"/>
      <text:p text:style-name="P22">Contains all the constants needed to define the parameters of the filters</text:p>
      <text:p text:style-name="P6"/>
      <text:p text:style-name="P6">NWSComps_MultiThreadProc.pas</text:p>
      <text:p text:style-name="P6"/>
      <text:p text:style-name="P22"><text:soft-page-break/>It is the specialized module for multithreaded processing.</text:p>
      <text:p text:style-name="P6"/>
      <text:p text:style-name="P6"/>
      <text:p text:style-name="P50">TIEProc_EX</text:p>
      <text:p text:style-name="P8"/>
      <text:p text:style-name="P1"><text:span text:style-name="T2">Properties</text:span><text:span text:style-name="T3"> </text:span></text:p>
      <text:p text:style-name="P6"/>
      <text:p text:style-name="P6">property MultiThreadEnabled: boolean</text:p>
      <text:p text:style-name="P6"/>
      <text:p text:style-name="P22">Defines the enabling / disabling of Multithreading at component’s level. When this is disabled, enabling multithreading at filter level, will not have effect.</text:p>
      <text:p text:style-name="P6"/>
      <text:p text:style-name="P6">property MultiThreadNrThreads: cardinal</text:p>
      <text:p text:style-name="P6"/>
      <text:p text:style-name="P22">Defines the number of Threads to be used in Multithreading at component’s level. This value will be used for all filters, unless otherwise defined in the <text:s/>OnFilter_CustomMultiThreadInfo event handler.</text:p>
      <text:p text:style-name="P6"/>
      <text:p text:style-name="P6">property MultiThreadDefOverlapMethod: TIEMultiProc_EX_OverlapMethod</text:p>
      <text:p text:style-name="P6"/>
      <text:p text:style-name="P22">Defines the Overlap Method for multithreading at component’s level. This value will be used for all filters, unless otherwise defined in the <text:s/>OnFilter_CustomMultiThreadInfo event handler.</text:p>
      <text:p text:style-name="P6"/>
      <text:p text:style-name="P6">property UseFastPreview: boolean</text:p>
      <text:p text:style-name="P6"/>
      <text:p text:style-name="P30">Defines the use of fast preview algorithm. It is best leave this on</text:p>
      <text:p text:style-name="P6"/>
      <text:p text:style-name="P6">property PreviewMode: TIEUtils_IEPreview_Mode</text:p>
      <text:p text:style-name="P6"/>
      <text:p text:style-name="P30">Can have 3 values:</text:p>
      <text:p text:style-name="P30"/>
      <text:list xml:id="list661335212" text:style-name="L2">
        <text:list-item>
          <text:p text:style-name="P80">pm_Auto: determines the preview mode automatically, choosing from the two other options listed below. It is best to choose this option in any case</text:p>
        </text:list-item>
        <text:list-item>
          <text:p text:style-name="P80">pm_Flat: to use only when the picture has no layers and no selections</text:p>
        </text:list-item>
        <text:list-item>
          <text:p text:style-name="P80">pm_FullUpdate: this is the most common type of preview, used when picture can have layers and selections</text:p>
        </text:list-item>
      </text:list>
      <text:p text:style-name="P6"/>
      <text:p text:style-name="P53">Methods</text:p>
      <text:p text:style-name="P6"/>
      <text:p text:style-name="P6">procedure Preview_Register(theIEView: Timageenview; theFilter: TIEProc_EX_Filter);overload;</text:p>
      <text:p text:style-name="P6"/>
      <text:p text:style-name="P31">Registers the preview of a single filter together with specified Imageenview</text:p>
      <text:p text:style-name="P6"/>
      <text:p text:style-name="P6">procedure Preview_Register(theIEView: Timageenview; theFilterList: TIEProc_EX_Filter_Collection);overload;</text:p>
      <text:p text:style-name="P6"/>
      <text:p text:style-name="P31">Registers the preview of a collection of filters together with specified Imageenview</text:p>
      <text:p text:style-name="P6"/>
      <text:p text:style-name="P6">procedure Preview_Unregister;</text:p>
      <text:p text:style-name="P6"/>
      <text:p text:style-name="P22">Call this method once you are done with the preview, to disable any update of the preview on the display.</text:p>
      <text:p text:style-name="P6"/>
      <text:p text:style-name="P6">procedure Preview_Apply;</text:p>
      <text:p text:style-name="P6"/>
      <text:p text:style-name="P22">This applies the filter or collection of filters that is currently being previewed to the current layer of the TImageEnview display. It should be used while still in preview mode.</text:p>
      <text:p text:style-name="P6"/>
      <text:p text:style-name="P6"><text:soft-page-break/>procedure Preview_Lock; procedure Preview_Unlock;</text:p>
      <text:p text:style-name="P6"/>
      <text:p text:style-name="P22">These two methods lock and unlock the preview (while in preview mode), in order to change the content of the TImageenview, for example loading a new picture or layer).</text:p>
      <text:p text:style-name="P6"/>
      <text:p text:style-name="P6">procedure Preview_Toggle(const bPreviewIsOn: boolean);</text:p>
      <text:p text:style-name="P6"/>
      <text:p text:style-name="P22">This method allows to switch on/off the preview while in preview mode in order to see the difference between the original picture and the picture with the filter applied.</text:p>
      <text:p text:style-name="P6"/>
      <text:p text:style-name="P6">procedure Process_Apply(theFilter: TIEProc_EX_Filter; const iFilter, iTot: integer)</text:p>
      <text:p text:style-name="P6">procedure Process_Apply(theFilterList: TIEProc_EX_Filter_Collection);</text:p>
      <text:p text:style-name="P6"/>
      <text:p text:style-name="P22">Call these methods to apply any Filter or filter collection to the attached TIEBitmap / TBitmap / TImageEnview but without previewing them.</text:p>
      <text:p text:style-name="P6"/>
      <text:p text:style-name="P6">procedure Process_ApplyCurrent;</text:p>
      <text:p text:style-name="P6"/>
      <text:p text:style-name="P22">Call this method to apply the currently registered Filter or collection of filters to the attached TIEBitmap / TBitmap / TImageEnview but without any preview.</text:p>
      <text:p text:style-name="P6"/>
      <text:p text:style-name="P53">Events</text:p>
      <text:p text:style-name="P6"/>
      <text:p text:style-name="P6">OnFilter_Progress: TIEProgressEvent</text:p>
      <text:p text:style-name="P6"/>
      <text:p text:style-name="P32">Use this with a progress bar to see the advancement of the filter processing</text:p>
      <text:p text:style-name="P6"/>
      <text:p text:style-name="P6">OnFilter_FinishWork: TnotifyEvent</text:p>
      <text:p text:style-name="P6"/>
      <text:p text:style-name="P32">This event occurs when the filter process is finished</text:p>
      <text:p text:style-name="P6"/>
      <text:p text:style-name="P6">OnFilter_CustomMultiThreadInfo: TIEProc_Ex_CustomMultiThreadInfoEvent</text:p>
      <text:p text:style-name="P6"/>
      <text:p text:style-name="P22">TIEProc_Ex_CustomMultiThreadInfoEvent is defined as follows:</text:p>
      <text:p text:style-name="P6"/>
      <text:p text:style-name="P6">procedure(filter: TIEProc_EX_Filter;</text:p>
      <text:p text:style-name="P6">var MtEnabled: TIEProc_EX_Filter_MultiThreadEnabled; var MtNrThreads: cardinal;</text:p>
      <text:p text:style-name="P6">var theOverlap: cardinal; var bAutoOverlap: boolean;</text:p>
      <text:p text:style-name="P6">var OverlapMethod: TIEMultiProc_EX_OverlapMethod) of object;</text:p>
      <text:p text:style-name="P6"/>
      <text:p text:style-name="P1"><text:span text:style-name="T3">→</text:span><text:span text:style-name="T5"> </text:span><text:span text:style-name="T7">Filter</text:span><text:span text:style-name="T9">: The filter for which you want to specify the custom Multithreading info</text:span><text:span text:style-name="T3">.</text:span></text:p>
      <text:p text:style-name="P1"><text:span text:style-name="T3">→</text:span><text:span text:style-name="T5"> </text:span><text:span text:style-name="T7">MtEnabled</text:span><text:span text:style-name="T9"> specify if your filter will accept Multithreading</text:span><text:span text:style-name="T6">. </text:span><text:span text:style-name="T10">It can</text:span><text:span text:style-name="T9"> have one of the following values</text:span><text:span text:style-name="T3">:</text:span></text:p>
      <text:p text:style-name="P57"/>
      <text:list xml:id="list1814141475" text:style-name="L3">
        <text:list-item>
          <text:p text:style-name="P81">mtAlwaysEnabled</text:p>
        </text:list-item>
        <text:list-item>
          <text:p text:style-name="P74"><text:span text:style-name="T1">mtEnabledExceptPreview </text:span><text:span text:style-name="T15">(some default filters do require MT to be disabled when previewing)</text:span></text:p>
        </text:list-item>
        <text:list-item>
          <text:p text:style-name="P81">mtDisabled</text:p>
        </text:list-item>
      </text:list>
      <text:p text:style-name="P6"/>
      <text:p text:style-name="P6"/>
      <text:p text:style-name="P1"><text:span text:style-name="T3">→</text:span><text:span text:style-name="T5"> </text:span><text:span text:style-name="T7">MtNrThreads</text:span><text:span text:style-name="T9">: The number of threads you want to use for the current filter</text:span></text:p>
      <text:p text:style-name="P2"><text:span text:style-name="T3">→</text:span><text:span text:style-name="T5"> </text:span><text:span text:style-name="T7">theOverlap</text:span><text:span text:style-name="T9">: The overlap in pixels you want to use for the current filter. It is 0 for all filters that compute the output from the input in a 1 to 1 pixel relation. In case your filter computes the output based on the values of the surrounding pixels, the bigger the radius in which the filter looks for, the bigger must be this value. The overlap value is already optimized for all the filters supported. Do not change this value if unsure</text:span></text:p>
      <text:p text:style-name="P2"><text:span text:style-name="T9">→</text:span><text:span text:style-name="T10"> </text:span><text:span text:style-name="T7">bAutoOverlap</text:span><text:span text:style-name="T9">: </text:span><text:span text:style-name="T10">s</text:span><text:span text:style-name="T9">pecify if the Multithreading engine is allowed to change the overlap for its own </text:span><text:soft-page-break/><text:span text:style-name="T9">optimizations. The AutoOverlap value is already optimized for all the filters supported. Do not change this value if unsure.</text:span></text:p>
      <text:p text:style-name="P1"><text:span text:style-name="T3">→</text:span><text:span text:style-name="T5"> </text:span><text:span text:style-name="T3">OverlapMethod: </text:span><text:span text:style-name="T9">Specify the overlap method to be used for the current filter. There are two possible values:</text:span></text:p>
      <text:list xml:id="list2144892458" text:style-name="L4">
        <text:list-item>
          <text:p text:style-name="P75"><text:span text:style-name="T1">omAddExtraPixels: <text:s/></text:span><text:span text:style-name="T15">achieves MT by adding extra pixels to process</text:span></text:p>
        </text:list-item>
        <text:list-item>
          <text:p text:style-name="P75"><text:span text:style-name="T1">omAddExtraThreads: </text:span><text:span text:style-name="T15">achieves MT by adding extra threads to process</text:span></text:p>
        </text:list-item>
      </text:list>
      <text:p text:style-name="P53"/>
      <text:p text:style-name="P53">List of Own Filters:</text:p>
      <text:p text:style-name="P6"/>
      <text:p text:style-name="P6"/>
      <text:p text:style-name="P54">TIEProc_EX_Filter_SmartFlash</text:p>
      <text:p text:style-name="P22">Multithreaded: YES</text:p>
      <text:p text:style-name="P6"/>
      <text:p text:style-name="P22">This filter acts on the dark (underexposed) parts of the picture, by smoothly illuminating them, without affecting the other parts of the picture that are already correctly exposed. It acts like an intelligent digital flash light.</text:p>
      <text:p text:style-name="P6"/>
      <text:p text:style-name="P6">Parameters:</text:p>
      <text:p text:style-name="P6"/>
      <text:p text:style-name="P22">Amount (integer: 0-255)</text:p>
      <text:p text:style-name="P22">Radius (Integer)</text:p>
      <text:p text:style-name="P6"/>
      <text:p text:style-name="P6"/>
      <text:p text:style-name="P54">TIEProc_EX_Filter_ReduceHighlights</text:p>
      <text:p text:style-name="P22">Multithreaded: YES</text:p>
      <text:p text:style-name="P6"/>
      <text:p text:style-name="P3"><text:span text:style-name="T1">This filter acts on t</text:span><text:span text:style-name="T16">e</text:span><text:span text:style-name="T1"> bright (overexposed) parts of the picture, by smoothly lowering them to the desired level, without affecting the other parts of the picture that are already correctly exposed. It can recover tones and details lost in the overexposed parts of the picture.</text:span></text:p>
      <text:p text:style-name="P6"/>
      <text:p text:style-name="P6">Parameters:</text:p>
      <text:p text:style-name="P6"/>
      <text:p text:style-name="P22">Amount (integer: 0-255)</text:p>
      <text:p text:style-name="P22">Radius (Integer)</text:p>
      <text:p text:style-name="P6"/>
      <text:p text:style-name="P55">TIEProc_EX_Filter_FillBackLight</text:p>
      <text:p text:style-name="P22">Multithreaded: YES</text:p>
      <text:p text:style-name="P6"/>
      <text:p text:style-name="P22">This filter improves the shadows and the high-lights, with the effect of recalibrating the tone-range of the picture.</text:p>
      <text:p text:style-name="P6"/>
      <text:p text:style-name="P6">Parameters:</text:p>
      <text:p text:style-name="P6"/>
      <text:p text:style-name="P22">FillLightAmount (integer: 0-255)</text:p>
      <text:p text:style-name="P22">BackLightAmount (integer: 0-255)</text:p>
      <text:p text:style-name="P22">Radius (Integer)</text:p>
      <text:p text:style-name="P6"/>
      <text:p text:style-name="P6"/>
      <text:p text:style-name="P55">TIEProc_EX_Filter_SmartContrast </text:p>
      <text:p text:style-name="P22">Multithreaded: YES</text:p>
      <text:p text:style-name="P6"/>
      <text:p text:style-name="P3"><text:span text:style-name="T1">This filter improves the contrast and details of the picture, </text:span><text:span text:style-name="T16">e</text:span><text:span text:style-name="T1">specially in the flat areas of the picture. It gives a sharper appearance, with clearer details to the picture.</text:span></text:p>
      <text:p text:style-name="P6"/>
      <text:p text:style-name="P6">Parameters:</text:p>
      <text:p text:style-name="P6"><text:soft-page-break/></text:p>
      <text:p text:style-name="P22">Amount (integer: 0-255)</text:p>
      <text:p text:style-name="P22">Radius (Integer)</text:p>
      <text:p text:style-name="P6"/>
      <text:p text:style-name="P6"/>
      <text:p text:style-name="P55">TIEProc_EX_Filter_RGBBalance</text:p>
      <text:p text:style-name="P22">Multithreaded: YES</text:p>
      <text:p text:style-name="P6"/>
      <text:p text:style-name="P1"><text:span text:style-name="T9">This filter provides a way to change the Color of an image using weights for different parts of</text:span><text:span text:style-name="T3"> </text:span><text:span text:style-name="T9">the tonal range.</text:span></text:p>
      <text:p text:style-name="P6"/>
      <text:p text:style-name="P6">Parameters:</text:p>
      <text:p text:style-name="P6"/>
      <text:p text:style-name="P22">Uniform (boolean)</text:p>
      <text:p text:style-name="P22">Amount Shadows Red (integer: -255 / +255)</text:p>
      <text:p text:style-name="P22">Amount Shadows Green (integer: -255 / +255)</text:p>
      <text:p text:style-name="P22">Amount Shadows Blue (integer: -255 / +255)</text:p>
      <text:p text:style-name="P22">Amount Midtones Red (integer: -255 / +255)</text:p>
      <text:p text:style-name="P22">Amount Midtones Green (integer: -255 / +255)</text:p>
      <text:p text:style-name="P22">Amount Midtones Blue (integer: -255 / +255)</text:p>
      <text:p text:style-name="P22">Amount Hilights Red (integer: -255 / +255)</text:p>
      <text:p text:style-name="P22">Amount Hilights Green (integer: -255 / +255)</text:p>
      <text:p text:style-name="P22">Amount Hilights Blue (integer: -255 / +255)</text:p>
      <text:p text:style-name="P22">Amount All Tones Red (integer: -255 / +255)</text:p>
      <text:p text:style-name="P22">Amount All Tones Green (integer: -255 / +255)</text:p>
      <text:p text:style-name="P22">Amount All Tones Blue (integer: -255 / +255)</text:p>
      <text:p text:style-name="P6"/>
      <text:p text:style-name="P55">TIEProc_EX_Filter_AutoColor</text:p>
      <text:p text:style-name="P22">Multithreaded: Disabled</text:p>
      <text:p text:style-name="P6"/>
      <text:p text:style-name="P22">This filter can be used to automatically balance the color in a picture and removing light color casts.</text:p>
      <text:p text:style-name="P22">The effect of this filter is subtle and it can be regulated by the strength parameter.</text:p>
      <text:p text:style-name="P6"/>
      <text:p text:style-name="P6">Parameters:</text:p>
      <text:p text:style-name="P6"/>
      <text:p text:style-name="P22">Strength (integer: 1-10)</text:p>
      <text:p text:style-name="P22"/>
      <text:p text:style-name="P22"/>
      <text:p text:style-name="P22"/>
      <text:p text:style-name="P56">TIEProc_EX_Filter_ColorFilter</text:p>
      <text:p text:style-name="P4"><text:span text:style-name="T1">Multithreaded: </text:span><text:span text:style-name="T17">YES</text:span></text:p>
      <text:p text:style-name="P33"/>
      <text:p text:style-name="P33">This filter applies a color to the image using different blend modes.</text:p>
      <text:p text:style-name="P33"/>
      <text:p text:style-name="P9">Parameters:</text:p>
      <text:p text:style-name="P9"/>
      <text:p text:style-name="P33">Amount (0-255)</text:p>
      <text:p text:style-name="P33">Color:TColor</text:p>
      <text:p text:style-name="P33">BlendMode: TIEProc_EX_Filter_Blendmode = (blmnormal = 0,</text:p>
      <text:p text:style-name="P33"><text:s text:c="33"/>blmoverlay = 1,</text:p>
      <text:p text:style-name="P33"><text:s text:c="33"/>blmhardlight = 2,</text:p>
      <text:p text:style-name="P33"><text:s text:c="33"/>blmmultiply = 3,</text:p>
      <text:p text:style-name="P33"><text:s text:c="33"/>blmscreen = 4);</text:p>
      <text:p text:style-name="P33"/>
      <text:p text:style-name="P6"/>
      <text:p text:style-name="P53">TIEProc_EX_Filter_BilateralFilter</text:p>
      <text:p text:style-name="P5"><text:soft-page-break/><text:span text:style-name="T1">Multithreaded: </text:span><text:span text:style-name="T17">YES</text:span></text:p>
      <text:p text:style-name="P34"/>
      <text:p text:style-name="P34">This filter applies <text:span text:style-name="T20">the bilateral algorithm that can be used to denoise images. It can be very slow on big images.</text:span></text:p>
      <text:p text:style-name="P34"/>
      <text:p text:style-name="P10">Parameters:</text:p>
      <text:p text:style-name="P10"/>
      <text:p text:style-name="P35">Sigma: typically between 10 and 40, this is the amount of denoising you apply</text:p>
      <text:p text:style-name="P35">Sigma Distance: the distance in the gaussian exponential algorithm. Typically between 10 and 20</text:p>
      <text:p text:style-name="P35">Radius: the increase of this parameters tends to make the filter slow. For small images use 1 or 2 for bigger images 3 or 4.</text:p>
      <text:p text:style-name="P35"/>
      <text:p text:style-name="P35"/>
      <text:p text:style-name="P70">TIEProc_EX_Filter_Smooth</text:p>
      <text:p text:style-name="P60">Multithreaded: <text:span text:style-name="T36">YES</text:span></text:p>
      <text:p text:style-name="P60"/>
      <text:p text:style-name="P63">This filter smooths the image preserving the edges</text:p>
      <text:p text:style-name="P63"/>
      <text:p text:style-name="P68">Parameters:</text:p>
      <text:p text:style-name="P63">Amount: the amount of the filter to be applied between 1 and 80 </text:p>
      <text:p text:style-name="P34"/>
      <text:p text:style-name="P71">TIEProc_EX_LightFX_Ellipse</text:p>
      <text:p text:style-name="P61">Multithreaded: <text:span text:style-name="T36">YES</text:span></text:p>
      <text:p text:style-name="P61"/>
      <text:p text:style-name="P66">Creates an elliptical light effect.</text:p>
      <text:p text:style-name="P66"/>
      <text:p text:style-name="P69">Parameters:</text:p>
      <text:p text:style-name="P69"><text:s text:c="2"/></text:p>
      <text:p text:style-name="P66">Color: The color of the Light (Tcolor)</text:p>
      <text:p text:style-name="P66">Light Amount: the amount of the light between 0 and 100</text:p>
      <text:p text:style-name="P66">Ellipse Minor Axis: between 1 and 10000 (you can change the max value at runtime)</text:p>
      <text:p text:style-name="P66">Ellipse Major Axis: between 1 and 10000 (you can change the max value at runtime)</text:p>
      <text:p text:style-name="P66">Angle: The angle: between 0 and 360</text:p>
      <text:p text:style-name="P66">CenterX: the X coordinate of the center 1..10000 <text:s/>(you can change the max value at runtime)</text:p>
      <text:p text:style-name="P66">CenterY: the Y coordinate of the center <text:s/>1.10000 <text:s/>(you can change the max value at runtime)</text:p>
      <text:p text:style-name="P69"/>
      <text:p text:style-name="P72">TIEProc_EX_LightFx_Beam <text:s text:c="2"/></text:p>
      <text:p text:style-name="P62">Multithreaded: <text:span text:style-name="T36">YES</text:span></text:p>
      <text:p text:style-name="P62"/>
      <text:p text:style-name="P66">Creates a beam of light effect.</text:p>
      <text:p text:style-name="P66"/>
      <text:p text:style-name="P69">Parameters:</text:p>
      <text:p text:style-name="P69"><text:s text:c="2"/></text:p>
      <text:p text:style-name="P66">Color: The color of the Light (Tcolor)</text:p>
      <text:p text:style-name="P66">Light Amount: the amount of the light between 0 and 100</text:p>
      <text:p text:style-name="P66">Beam Size: 1.5000 (you can change the max value at runtime)</text:p>
      <text:p text:style-name="P66">Angle: The angle: between 0 and 360</text:p>
      <text:p text:style-name="P66">CenterX: the X coordinate of the center 1..10000 <text:s/>(you can change the max value at runtime)</text:p>
      <text:p text:style-name="P66">CenterY: the Y coordinate of the center <text:s/>1.10000 <text:s/>(you can change the max value at runtime)</text:p>
      <text:p text:style-name="P66"/>
      <text:p text:style-name="P72">TIEProc_EX_LightFx_DoubleBeam <text:s text:c="2"/></text:p>
      <text:p text:style-name="P62">Multithreaded: <text:span text:style-name="T36">YES</text:span></text:p>
      <text:p text:style-name="P62"/>
      <text:p text:style-name="P66">Creates a <text:span text:style-name="T37">double </text:span>beam of light effect.</text:p>
      <text:p text:style-name="P66"/>
      <text:p text:style-name="P69">Parameters:</text:p>
      <text:p text:style-name="P69"><text:soft-page-break/><text:s text:c="2"/></text:p>
      <text:p text:style-name="P66">Color: The color of the Light (Tcolor)</text:p>
      <text:p text:style-name="P66">Light Amount: the amount of the light between 0 and 100</text:p>
      <text:p text:style-name="P66">Beam Size: 1.5000 (you can change the max value at runtime)</text:p>
      <text:p text:style-name="P66">Angle: The angle: between 0 and 360</text:p>
      <text:p text:style-name="P67">Opening: between 0 and 100</text:p>
      <text:p text:style-name="P66">CenterX: the X coordinate of the center 1..10000 <text:s/>(you can change the max value at runtime)</text:p>
      <text:p text:style-name="P66">CenterY: the Y coordinate of the center <text:s/>1.10000 <text:s/>(you can change the max value at runtime)</text:p>
      <text:p text:style-name="P6"/>
      <text:p text:style-name="P53">List of natively supported ImageEn Filters:</text:p>
      <text:p text:style-name="P6"/>
      <text:p text:style-name="P10">TIEProc_EX_Filter_IE_UnsharpMask</text:p>
      <text:p text:style-name="P24">Multithreaded: Yes</text:p>
      <text:p text:style-name="P6"/>
      <text:p text:style-name="P6">TIEProc_EX_Filter_IE_Blur</text:p>
      <text:p text:style-name="P24">Multithreaded: Yes</text:p>
      <text:p text:style-name="P6"/>
      <text:p text:style-name="P6">TIEProc_EX_Filter_IE_HSLVar</text:p>
      <text:p text:style-name="P24">Multithreaded: Yes</text:p>
      <text:p text:style-name="P6"/>
      <text:p text:style-name="P6">TIEProc_EX_Filter_IE_HSVVar</text:p>
      <text:p text:style-name="P24">Multithreaded: Yes</text:p>
      <text:p text:style-name="P6"/>
      <text:p text:style-name="P6">TIEProc_EX_Filter_IE_Negative</text:p>
      <text:p text:style-name="P24">Multithreaded: Yes</text:p>
      <text:p text:style-name="P6"/>
      <text:p text:style-name="P6">TIEProc_EX_Filter_IE_IntensityRGBAll</text:p>
      <text:p text:style-name="P24">Multithreaded: Yes</text:p>
      <text:p text:style-name="P6"/>
      <text:p text:style-name="P6">TIEProc_EX_Filter_IE_Intensity</text:p>
      <text:p text:style-name="P24">Multithreaded: Yes</text:p>
      <text:p text:style-name="P6"/>
      <text:p text:style-name="P6">TIEProc_EX_Filter_IE_Contrast</text:p>
      <text:p text:style-name="P24">Multithreaded: Yes</text:p>
      <text:p text:style-name="P6"/>
      <text:p text:style-name="P6">TIEProc_EX_Filter_IE_Contrast2</text:p>
      <text:p text:style-name="P24">Multithreaded: Yes</text:p>
      <text:p text:style-name="P6"/>
      <text:p text:style-name="P6">TIEProc_EX_Filter_IE_Contrast3</text:p>
      <text:p text:style-name="P24">Multithreaded: Yes</text:p>
      <text:p text:style-name="P6"/>
      <text:p text:style-name="P6">TIEProc_EX_Filter_IE_GammaCorrect</text:p>
      <text:p text:style-name="P24">Multithreaded: Yes</text:p>
      <text:p text:style-name="P6"/>
      <text:p text:style-name="P6">TIEProc_EX_Filter_IE_AutoSharp</text:p>
      <text:p text:style-name="P24">Multithreaded: Yes</text:p>
      <text:p text:style-name="P6"/>
      <text:p text:style-name="P6">TIEProc_EX_Filter_IE_Colorize</text:p>
      <text:p text:style-name="P24">Multithreaded: Yes</text:p>
      <text:p text:style-name="P6"/>
      <text:p text:style-name="P6">TIEProc_EX_Filter_IE_AdjustBrightnessContrastSaturation</text:p>
      <text:p text:style-name="P24">Multithreaded: Yes</text:p>
      <text:p text:style-name="P6"/>
      <text:p text:style-name="P6">TIEProc_EX_Filter_IE_AdjustTint</text:p>
      <text:p text:style-name="P24">Multithreaded: Yes</text:p>
      <text:p text:style-name="P6"/>
      <text:p text:style-name="P6"><text:soft-page-break/></text:p>
      <text:p text:style-name="P6">TIEProc_EX_Filter_IE_AdjustSaturation</text:p>
      <text:p text:style-name="P24">Multithreaded: Yes</text:p>
      <text:p text:style-name="P6"/>
      <text:p text:style-name="P6">TIEProc_EX_Filter_IE_AdjustTemperature</text:p>
      <text:p text:style-name="P24">Multithreaded: Yes</text:p>
      <text:p text:style-name="P6"/>
      <text:p text:style-name="P6">TIEProc_EX_Filter_IE_AdjustLumSatHistogram</text:p>
      <text:p text:style-name="P24">Multithreaded: Yes</text:p>
      <text:p text:style-name="P6"/>
      <text:p text:style-name="P6">TIEProc_EX_Filter_IE_AutoImageEnhance1</text:p>
      <text:p text:style-name="P24">Multithreaded: Disabled</text:p>
      <text:p text:style-name="P6"/>
      <text:p text:style-name="P6">TIEProc_EX_Filter_IE_AutoImageEnhance2</text:p>
      <text:p text:style-name="P24">Multithreaded: Disabled</text:p>
      <text:p text:style-name="P6"/>
      <text:p text:style-name="P6">TIEProc_EX_Filter_IE_AutoImageEnhance3</text:p>
      <text:p text:style-name="P24">Multithreaded: YES</text:p>
      <text:p text:style-name="P24"/>
      <text:p text:style-name="P20">TIEProc_EX_Filter_IE_AdjustLumSatHistogram</text:p>
      <text:p text:style-name="P28">Multithreaded: YES</text:p>
      <text:p text:style-name="P24"/>
      <text:p text:style-name="P20">TIEProc_EX_Filter_IE_WhiteBalance_coef</text:p>
      <text:p text:style-name="P28"><text:s/>Multithreaded: YES </text:p>
      <text:p text:style-name="P24"/>
      <text:p text:style-name="P20">TIEProc_EX_Filter_IE_WhiteBalance_Grayworld </text:p>
      <text:p text:style-name="P28">Multithreaded: Disabled</text:p>
      <text:p text:style-name="P24"/>
      <text:p text:style-name="P24"><text:span text:style-name="T25">TIEProc_EX_Filter_IE_WhiteBalance_WhiteAt</text:span> </text:p>
      <text:p text:style-name="P28">Multithreaded: YES <text:s text:c="2"/></text:p>
      <text:p text:style-name="P24"/>
      <text:p text:style-name="P24"><text:span text:style-name="T26">T</text:span><text:span text:style-name="T25">IEProc_EX_Filter_IE_WhiteBalance_AutoWhite</text:span></text:p>
      <text:p text:style-name="P28">Multithreaded: Disabled</text:p>
      <text:p text:style-name="P24"/>
      <text:p text:style-name="P11">TIEProc_EX_Filter_IE_<text:span text:style-name="T21">Median_Sharpen</text:span></text:p>
      <text:p text:style-name="P26">Multithreaded: Yes</text:p>
      <text:p text:style-name="P37">This is the Imageen filter: Median, but used in Sharpen mode (there are 3 modes in the original filter)</text:p>
      <text:p text:style-name="P37"/>
      <text:p text:style-name="P13">TIEProc_EX_Filter_IE_<text:span text:style-name="T21">Median</text:span></text:p>
      <text:p text:style-name="P27">Multithreaded: Yes</text:p>
      <text:p text:style-name="P38">This is the Imageen filter: Median, used in <text:span text:style-name="T30">Median</text:span> mode (there are 3 modes in the original filter)</text:p>
      <text:p text:style-name="P37"/>
      <text:p text:style-name="P14">TIEProc_EX_Filter_IE_<text:span text:style-name="T21">Sharpen</text:span></text:p>
      <text:p text:style-name="P39">Multithreaded: Yes</text:p>
      <text:p text:style-name="P37"/>
      <text:p text:style-name="P37"/>
      <text:p text:style-name="P51">Class TIEProc_EX_FiltersPanel</text:p>
      <text:p text:style-name="P12"/>
      <text:p text:style-name="P12"><text:span text:style-name="T23">TScrollbox</text:span> ← TIEProc_EX_<text:span text:style-name="T23">FiltersPanel</text:span></text:p>
      <text:p text:style-name="P17">Declared in Unit NWSComps_<text:span text:style-name="T23">FiltersPanel</text:span></text:p>
      <text:p text:style-name="P17"/>
      <text:p text:style-name="P40">This component lets you build the user interface for the filters in no time. For example:</text:p>
      <text:p text:style-name="P40"/>
      <text:p text:style-name="P40"><text:s/>fFilterList := TIEProc_EX_Filter_Collection.Create; <text:s/>//Create the collection of filters</text:p>
      <text:p text:style-name="P40"/>
      <text:p text:style-name="P40">//<text:span text:style-name="T25">now we add three filters to the list</text:span></text:p>
      <text:p text:style-name="P40"><text:soft-page-break/>fFilterList.Add(TIEProc_EX_Filter_IE_AdjustTemperature.Create);</text:p>
      <text:p text:style-name="P40">fFilterList.Add(TIEProc_EX_Filter_IE_HSVVar.Create);</text:p>
      <text:p text:style-name="P40">fFilterList.Add(TIEProc_EX_Filter_IE_UnsharpMask.Create);</text:p>
      <text:p text:style-name="P40"/>
      <text:p text:style-name="P40">//<text:span text:style-name="T25">now we assign the filters to the FiltersPanel</text:span>:</text:p>
      <text:p text:style-name="P40">FiltersPanel1.FilterList := fFilterList; <text:s/>//<text:span text:style-name="T27">Creates automatically the filters GUI</text:span></text:p>
      <text:p text:style-name="P40"><text:s/></text:p>
      <text:p text:style-name="P47">Every time you assign the FilterList property the GUI is rebuilt, so once done, do it again only if you want to assign another filter list or you have changed the number or the order of the filters in the same filter list.</text:p>
      <text:p text:style-name="P40"/>
      <text:p text:style-name="P18">//<text:span text:style-name="T24">Now for example we </text:span>reset the <text:span text:style-name="T24">valu</text:span>es of the filters</text:p>
      <text:p text:style-name="P40">for I := 0 to fFilterList.Count-1 do</text:p>
      <text:p text:style-name="P40"><text:s text:c="4"/>begin</text:p>
      <text:p text:style-name="P40"><text:s text:c="6"/>fFilterList.Filter[i].Active := false; <text:s/>//<text:span text:style-name="T24">set active to false</text:span></text:p>
      <text:p text:style-name="P40"><text:s text:c="6"/>for j := 0 to filter.Params.Count-1 do</text:p>
      <text:p text:style-name="P40"><text:s text:c="6"/>begin</text:p>
      <text:p text:style-name="P40"><text:s text:c="8"/>param := filter.Params.Params[j];</text:p>
      <text:p text:style-name="P40"><text:s text:c="8"/>if param.Has_Default then</text:p>
      <text:p text:style-name="P40"><text:s text:c="10"/>filter.SetParamValue(param.Name, param.DefValue); <text:s/>//<text:span text:style-name="T24">set default value</text:span></text:p>
      <text:p text:style-name="P40"><text:s text:c="6"/>end;</text:p>
      <text:p text:style-name="P40"><text:s text:c="4"/>end; </text:p>
      <text:p text:style-name="P40"/>
      <text:p text:style-name="P19">//<text:span text:style-name="T24">And u</text:span>pdate the filters Panel <text:span text:style-name="T28">just calling a method</text:span></text:p>
      <text:p text:style-name="P41">FiltersPanel1.<text:span text:style-name="T25">UpdateFromFilters</text:span>; </text:p>
      <text:p text:style-name="P41"/>
      <text:p text:style-name="P43">Now if you want to start to preview the filters on a Timageenview you only have to register the TIEProc_Ex component. </text:p>
      <text:p text:style-name="P43"/>
      <text:p text:style-name="P43">IEProcEX1.Preview_Register(ImageEnView1, fFilterList);</text:p>
      <text:p text:style-name="P43"/>
      <text:p text:style-name="P43">Then using the UI provided by the FiltersPanel you will be able to preview the effect of the filters on the registered Imageenview.</text:p>
      <text:p text:style-name="P43"/>
      <text:p text:style-name="P52">Events</text:p>
      <text:p text:style-name="P43"/>
      <text:p text:style-name="P44">The FiltersPanel has also some useful events:</text:p>
      <text:p text:style-name="P44"/>
      <text:p text:style-name="P44"><text:span text:style-name="T25">OnAddFilterParam</text:span>: TIEProc_EX_FiltersPanelAddParamEvent;</text:p>
      <text:p text:style-name="P44"/>
      <text:p text:style-name="P44">You can use this event to exclude some parameters from the user interface. So that they cannot be manipulated by the user.</text:p>
      <text:p text:style-name="P44">For example:</text:p>
      <text:p text:style-name="P44"/>
      <text:p text:style-name="P44"><text:span text:style-name="T23">FiltersPanel1.</text:span>OnAddFilterParam := HandleAddFilterParam;</text:p>
      <text:p text:style-name="P44"/>
      <text:p text:style-name="P44">procedure TForm1.HandleAddFilterParam(Filter:TIEProc_EX_Filter; Param:TIEProc_EX_Filter_Param; var bCanAdd:boolean);</text:p>
      <text:p text:style-name="P44">begin</text:p>
      <text:p text:style-name="P44"><text:s text:c="2"/>//<text:span text:style-name="T29">by default bCanAdd is true</text:span></text:p>
      <text:p text:style-name="P44"><text:s text:c="3"/>if Filter.ID = IEPROC_EX_IE_AUTOIMAGEENHANCE1_ID then</text:p>
      <text:p text:style-name="P44"><text:s text:c="3"/>begin</text:p>
      <text:p text:style-name="P44"><text:s text:c="5"/>bCanAdd := false; //no parameters for autoenhance (use default)</text:p>
      <text:p text:style-name="P44"><text:s text:c="3"/>end</text:p>
      <text:p text:style-name="P44"><text:s text:c="3"/>else if Filter.ID = IEPROC_EX_IE_AUTOIMAGEENHANCE2_ID then</text:p>
      <text:p text:style-name="P44"><text:s text:c="3"/>begin</text:p>
      <text:p text:style-name="P44"><text:s text:c="5"/>bCanAdd := false; //no parameters for autoenhance <text:s/>(use default)</text:p>
      <text:p text:style-name="P44"><text:soft-page-break/><text:s text:c="3"/>end</text:p>
      <text:p text:style-name="P44"><text:s text:c="3"/>else if Filter.ID = IEPROC_EX_IE_AUTOIMAGEENHANCE3_ID then</text:p>
      <text:p text:style-name="P44"><text:s text:c="3"/>begin</text:p>
      <text:p text:style-name="P44"><text:s text:c="5"/>bCanAdd := false; //no parameters for autoenhance <text:s text:c="2"/>(use default)</text:p>
      <text:p text:style-name="P44"><text:s text:c="3"/>end</text:p>
      <text:p text:style-name="P44"><text:s text:c="3"/>else if Filter.ID = IEPROC_EX_IE_GAMMACORRECT_ID then</text:p>
      <text:p text:style-name="P44"><text:s text:c="3"/>begin</text:p>
      <text:p text:style-name="P44"><text:s text:c="5"/>//we want only <text:span text:style-name="T29">the </text:span>Gamma amount</text:p>
      <text:p text:style-name="P44"><text:s text:c="5"/>bCanAdd := Param.Name = IEPROC_EX_IE_GAMMACORRECT_GAMMA; </text:p>
      <text:p text:style-name="P44"><text:s text:c="3"/>end;</text:p>
      <text:p text:style-name="P44">end;</text:p>
      <text:p text:style-name="P44"/>
      <text:p text:style-name="P44"/>
      <text:p text:style-name="P44"><text:span text:style-name="T25">OnCustomInsert</text:span>: TIEProc_EX_FiltersPanelCustomInsertEvent;</text:p>
      <text:p text:style-name="P44"/>
      <text:p text:style-name="P46">This event is useful if you want to add a custom control for a custom filter, such as our TRGBCurves control. For example:</text:p>
      <text:p text:style-name="P46"/>
      <text:p text:style-name="P42">FiltersPanel1.OnCustomInsert := HandleFiltersPanelCustomInsert;</text:p>
      <text:p text:style-name="P45"/>
      <text:p text:style-name="P45">procedure TForm1.HandleFiltersPanelCustomInsert(Filter:TIEProc_EX_Filter; <text:s/>var ControlToInsert: TControl);</text:p>
      <text:p text:style-name="P45">begin</text:p>
      <text:p text:style-name="P45"><text:s text:c="2"/>if Filter.ID = CUSTOMFILTER_RGBCURVES then</text:p>
      <text:p text:style-name="P45"><text:s text:c="4"/>ControlToInsert := Panel_Curves;</text:p>
      <text:p text:style-name="P4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color="#0000ff"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0000a"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ListLabel_20_4" style:display-name="ListLabel 4" style:family="text">
      <style:text-properties fo:color="#000080" style:font-name="Arial" fo:font-family="Arial" style:font-family-generic="roman" style:font-pitch="variable" fo:font-size="12pt" style:text-underline-style="solid" style:text-underline-width="auto" style:text-underline-color="font-color" style:font-size-asian="12pt"/>
    </style:style>
    <style:style style:name="ListLabel_20_5" style:display-name="ListLabel 5" style:family="text">
      <style:text-properties fo:color="#000080" style:font-name="Arial" fo:font-family="Arial"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85cm" fo:margin-bottom="2.54cm" fo:margin-left="3.175cm" fo:margin-right="3.175cm" style:writing-mode="lr-tb" style:layout-grid-color="#c0c0c0" style:layout-grid-lines="229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08cm" fo:margin-bottom="2.54cm" fo:margin-left="3.835cm" fo:margin-right="3.246cm" style:writing-mode="lr-tb" style:layout-grid-color="#c0c0c0" style:layout-grid-lines="228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06cm" fo:margin-bottom="2.54cm" fo:margin-left="3.21cm" fo:margin-right="3.528cm" style:writing-mode="lr-tb" style:layout-grid-color="#c0c0c0" style:layout-grid-lines="2289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21cm" fo:margin-right="3.246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08cm" fo:margin-bottom="2.54cm" fo:margin-left="3.175cm" fo:margin-right="3.14cm" style:writing-mode="lr-tb" style:layout-grid-color="#c0c0c0" style:layout-grid-lines="228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487cm" fo:margin-bottom="2.54cm" fo:margin-left="3.175cm" fo:margin-right="3.14cm" style:writing-mode="lr-tb" style:layout-grid-color="#c0c0c0" style:layout-grid-lines="229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54cm" fo:margin-bottom="2.54cm" fo:margin-left="3.175cm" fo:margin-right="3.1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9T10:34:42.094000000</dc:date>
    <meta:editing-duration>PT2H3M49S</meta:editing-duration>
    <meta:editing-cycles>33</meta:editing-cycles>
    <meta:generator>LibreOffice/6.0.3.2$Windows_X86_64 LibreOffice_project/8f48d515416608e3a835360314dac7e47fd0b821</meta:generator>
    <meta:document-statistic meta:table-count="0" meta:image-count="0" meta:object-count="0" meta:page-count="11" meta:paragraph-count="336" meta:word-count="2639" meta:character-count="19290" meta:non-whitespace-character-count="16669"/>
  </office:meta>
</office:document-meta>
</file>