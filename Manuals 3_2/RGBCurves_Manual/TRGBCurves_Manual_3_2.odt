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335cm"/>
      <style:text-properties style:font-name="Times New Roman" officeooo:paragraph-rsid="001b5067"/>
    </style:style>
    <style:style style:name="P2" style:family="paragraph" style:parent-style-name="Standard">
      <style:paragraph-properties fo:line-height="0.332cm"/>
      <style:text-properties style:font-name="Times New Roman" fo:font-size="10pt" officeooo:paragraph-rsid="001b5067" style:font-size-asian="10pt" style:font-size-complex="10pt"/>
    </style:style>
    <style:style style:name="P3"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font-size="10pt" style:font-size-asian="10pt" style:font-size-complex="10pt"/>
    </style:style>
    <style:style style:name="P4"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style:font-name="Arial" fo:font-size="12pt" fo:font-weight="bold" style:font-size-asian="12pt" style:font-weight-asian="bold" style:font-size-complex="12pt"/>
    </style:style>
    <style:style style:name="P5"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style:font-name="Arial" fo:font-size="10pt" fo:font-weight="bold" style:font-size-asian="10pt" style:font-weight-asian="bold" style:font-size-complex="10pt"/>
    </style:style>
    <style:style style:name="P6"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style:font-name="Arial" fo:font-size="10pt" fo:font-weight="bold" officeooo:paragraph-rsid="0021e770" style:font-size-asian="10pt" style:font-weight-asian="bold" style:font-size-complex="10pt"/>
    </style:style>
    <style:style style:name="P7" style:family="paragraph" style:parent-style-name="Standard" style:master-page-name="">
      <loext:graphic-properties draw:fill="none"/>
      <style:paragraph-properties fo:margin-left="1cm" fo:margin-right="0cm" fo:line-height="0.49cm" fo:text-align="start" style:justify-single-word="false" fo:text-indent="0cm" style:auto-text-indent="false" style:page-number="auto" fo:background-color="transparent">
        <style:tab-stops/>
      </style:paragraph-properties>
      <style:text-properties style:font-name="Arial" fo:font-size="10pt" fo:font-weight="bold" officeooo:rsid="0021e770" officeooo:paragraph-rsid="0021e770" style:font-size-asian="10pt" style:font-weight-asian="bold" style:font-size-complex="10pt" style:font-weight-complex="bold"/>
    </style:style>
    <style:style style:name="P8"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style:font-name="Arial" fo:font-size="10pt" fo:font-weight="bold" officeooo:rsid="0025309c" officeooo:paragraph-rsid="0025309c" style:font-size-asian="10pt" style:font-weight-asian="bold" style:font-size-complex="10pt"/>
    </style:style>
    <style:style style:name="P9"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style:font-name="Arial" fo:font-size="10pt" fo:font-weight="normal" officeooo:paragraph-rsid="001b5067" style:font-size-asian="10pt" style:font-weight-asian="normal" style:font-size-complex="10pt" style:font-weight-complex="normal"/>
    </style:style>
    <style:style style:name="P10"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style:font-name="Arial" fo:font-size="10pt" fo:font-weight="normal" style:font-size-asian="10pt" style:font-weight-asian="normal" style:font-size-complex="10pt" style:font-weight-complex="normal"/>
    </style:style>
    <style:style style:name="P1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style:font-name="Arial" fo:font-size="11pt" fo:font-weight="bold" officeooo:paragraph-rsid="0021e770" style:font-size-asian="11pt" style:font-weight-asian="bold" style:font-size-complex="11pt"/>
    </style:style>
    <style:style style:name="P12"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0pt" style:font-size-asian="10pt" style:font-size-complex="10pt"/>
    </style:style>
    <style:style style:name="P13"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0pt" officeooo:paragraph-rsid="00167221" style:font-size-asian="10pt" style:font-size-complex="10pt"/>
    </style:style>
    <style:style style:name="P14"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0pt" officeooo:paragraph-rsid="001b5067" style:font-size-asian="10pt" style:font-size-complex="10pt"/>
    </style:style>
    <style:style style:name="P15"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0pt" fo:font-weight="normal" style:font-size-asian="10pt" style:font-weight-asian="normal" style:font-size-complex="10pt" style:font-weight-complex="normal"/>
    </style:style>
    <style:style style:name="P16"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0pt" fo:font-weight="normal" officeooo:paragraph-rsid="001b5067" style:font-size-asian="10pt" style:font-weight-asian="normal" style:font-size-complex="10pt" style:font-weight-complex="normal"/>
    </style:style>
    <style:style style:name="P17"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0pt" fo:font-weight="normal" officeooo:paragraph-rsid="0021e770" style:font-size-asian="10pt" style:font-weight-asian="normal" style:font-size-complex="10pt" style:font-weight-complex="normal"/>
    </style:style>
    <style:style style:name="P18"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1pt" style:font-size-asian="11pt" style:font-size-complex="11pt"/>
    </style:style>
    <style:style style:name="P19"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style:font-size-asian="10pt" style:font-weight-asian="bold" style:font-size-complex="10pt"/>
    </style:style>
    <style:style style:name="P20"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paragraph-rsid="00167221" style:font-size-asian="10pt" style:font-weight-asian="bold" style:font-size-complex="10pt"/>
    </style:style>
    <style:style style:name="P21"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paragraph-rsid="00179ec9" style:font-size-asian="10pt" style:font-weight-asian="bold" style:font-size-complex="10pt"/>
    </style:style>
    <style:style style:name="P22"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paragraph-rsid="001a35bf" style:font-size-asian="10pt" style:font-weight-asian="bold" style:font-size-complex="10pt"/>
    </style:style>
    <style:style style:name="P23"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paragraph-rsid="001b5067" style:font-size-asian="10pt" style:font-weight-asian="bold" style:font-size-complex="10pt"/>
    </style:style>
    <style:style style:name="P24"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paragraph-rsid="001deca3" style:font-size-asian="10pt" style:font-weight-asian="bold" style:font-size-complex="10pt"/>
    </style:style>
    <style:style style:name="P25"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paragraph-rsid="0020ccf0" style:font-size-asian="10pt" style:font-weight-asian="bold" style:font-size-complex="10pt"/>
    </style:style>
    <style:style style:name="P26"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paragraph-rsid="0021e770" style:font-size-asian="10pt" style:font-weight-asian="bold" style:font-size-complex="10pt"/>
    </style:style>
    <style:style style:name="P27"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style:font-size-asian="10pt" style:font-weight-asian="bold" style:font-size-complex="10pt" style:font-weight-complex="bold"/>
    </style:style>
    <style:style style:name="P28"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1b5067" officeooo:paragraph-rsid="001b5067" style:font-size-asian="10pt" style:font-weight-asian="bold" style:font-size-complex="10pt"/>
    </style:style>
    <style:style style:name="P29"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1c3a73" officeooo:paragraph-rsid="001c3a73" style:font-size-asian="10pt" style:font-weight-asian="bold" style:font-size-complex="10pt"/>
    </style:style>
    <style:style style:name="P30"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1deca3" officeooo:paragraph-rsid="001deca3" style:font-size-asian="10pt" style:font-weight-asian="bold" style:font-size-complex="10pt"/>
    </style:style>
    <style:style style:name="P31"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1fc781" officeooo:paragraph-rsid="001fc781" style:font-size-asian="10pt" style:font-weight-asian="bold" style:font-size-complex="10pt"/>
    </style:style>
    <style:style style:name="P32"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20ccf0" officeooo:paragraph-rsid="0020ccf0" style:font-size-asian="10pt" style:font-weight-asian="bold" style:font-size-complex="10pt"/>
    </style:style>
    <style:style style:name="P33"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216ec6" officeooo:paragraph-rsid="00216ec6" style:font-size-asian="10pt" style:font-weight-asian="bold" style:font-size-complex="10pt"/>
    </style:style>
    <style:style style:name="P34"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216ec6" officeooo:paragraph-rsid="0021e770" style:font-size-asian="10pt" style:font-weight-asian="bold" style:font-size-complex="10pt"/>
    </style:style>
    <style:style style:name="P35"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21e770" officeooo:paragraph-rsid="0021e770" style:font-size-asian="10pt" style:font-weight-asian="bold" style:font-size-complex="10pt"/>
    </style:style>
    <style:style style:name="P36"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25309c" officeooo:paragraph-rsid="0025309c" style:font-size-asian="10pt" style:font-weight-asian="bold" style:font-size-complex="10pt"/>
    </style:style>
    <style:style style:name="P37"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rsid="00271836" officeooo:paragraph-rsid="00271836" style:font-size-asian="10pt" style:font-weight-asian="bold" style:font-size-complex="10pt"/>
    </style:style>
    <style:style style:name="P38"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normal" style:font-size-asian="10pt" style:font-weight-asian="normal" style:font-size-complex="10pt" style:font-weight-complex="normal"/>
    </style:style>
    <style:style style:name="P39"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normal" officeooo:paragraph-rsid="00167221" style:font-size-asian="10pt" style:font-weight-asian="normal" style:font-size-complex="10pt" style:font-weight-complex="normal"/>
    </style:style>
    <style:style style:name="P40"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normal" officeooo:paragraph-rsid="00179ec9" style:font-size-asian="10pt" style:font-weight-asian="normal" style:font-size-complex="10pt" style:font-weight-complex="normal"/>
    </style:style>
    <style:style style:name="P41"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normal" officeooo:paragraph-rsid="001a35bf" style:font-size-asian="10pt" style:font-weight-asian="normal" style:font-size-complex="10pt" style:font-weight-complex="normal"/>
    </style:style>
    <style:style style:name="P42"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normal" officeooo:paragraph-rsid="001b5067" style:font-size-asian="10pt" style:font-weight-asian="normal" style:font-size-complex="10pt" style:font-weight-complex="normal"/>
    </style:style>
    <style:style style:name="P43"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normal" officeooo:paragraph-rsid="0021e770" style:font-size-asian="10pt" style:font-weight-asian="normal" style:font-size-complex="10pt" style:font-weight-complex="normal"/>
    </style:style>
    <style:style style:name="P44"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normal" officeooo:rsid="001a35bf" officeooo:paragraph-rsid="001a35bf" style:font-size-asian="10pt" style:font-weight-asian="normal" style:font-size-complex="10pt" style:font-weight-complex="normal"/>
    </style:style>
    <style:style style:name="P45"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2pt" fo:font-weight="bold" style:font-size-asian="12pt" style:font-weight-asian="bold" style:font-size-complex="12pt"/>
    </style:style>
    <style:style style:name="P46"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1pt" fo:font-weight="bold" style:font-size-asian="11pt" style:font-weight-asian="bold" style:font-size-complex="11pt"/>
    </style:style>
    <style:style style:name="P47" style:family="paragraph" style:parent-style-name="Standard">
      <style:paragraph-properties fo:margin-left="4.24cm" fo:margin-right="0cm" fo:text-align="start" style:justify-single-word="false" fo:text-indent="0cm" style:auto-text-indent="false"/>
      <style:text-properties style:font-name="Arial" fo:font-size="10pt" fo:font-weight="bold" style:font-size-asian="10pt" style:font-weight-asian="bold" style:font-size-complex="10pt"/>
    </style:style>
    <style:style style:name="P48" style:family="paragraph" style:parent-style-name="Standard" style:master-page-name="">
      <loext:graphic-properties draw:fill="none"/>
      <style:paragraph-properties fo:margin-left="1cm" fo:margin-right="1.799cm" fo:line-height="114%" fo:text-align="start" style:justify-single-word="false" fo:text-indent="0cm" style:auto-text-indent="false" style:page-number="auto" fo:background-color="transparent"/>
      <style:text-properties style:font-name="Arial" fo:font-size="10pt" officeooo:paragraph-rsid="001b5067" style:font-size-asian="10pt" style:font-size-complex="10pt"/>
    </style:style>
    <style:style style:name="P49" style:family="paragraph" style:parent-style-name="Standard" style:master-page-name="Standard">
      <loext:graphic-properties draw:fill="none"/>
      <style:paragraph-properties fo:margin-left="1cm" fo:margin-right="0cm" fo:text-align="start" style:justify-single-word="false" fo:text-indent="0cm" style:auto-text-indent="false" style:page-number="auto" fo:background-color="transparent"/>
      <style:text-properties fo:font-size="12pt" style:font-size-asian="12pt" style:font-size-complex="12pt"/>
    </style:style>
    <style:style style:name="P50"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2pt" style:font-size-asian="12pt" style:font-size-complex="12pt"/>
    </style:style>
    <style:style style:name="P51"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2pt" officeooo:rsid="002b7f12" officeooo:paragraph-rsid="002b7f12" style:font-size-asian="12pt" style:font-size-complex="12pt"/>
    </style:style>
    <style:style style:name="P52"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Arial" fo:font-size="10pt" fo:font-weight="bold" officeooo:paragraph-rsid="002b7f12" style:font-size-asian="10pt" style:font-weight-asian="bold" style:font-size-complex="10pt"/>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officeooo:rsid="0015d96f" style:font-weight-asian="bold"/>
    </style:style>
    <style:style style:name="T4" style:family="text">
      <style:text-properties style:font-name="Arial" fo:font-weight="bold" style:font-weight-asian="bold" style:font-weight-complex="bold"/>
    </style:style>
    <style:style style:name="T5" style:family="text">
      <style:text-properties style:font-name="Arial" fo:font-weight="bold" officeooo:rsid="001b5067" style:font-weight-asian="bold" style:font-weight-complex="bold"/>
    </style:style>
    <style:style style:name="T6" style:family="text">
      <style:text-properties style:font-name="Arial" fo:font-weight="bold" officeooo:rsid="00179ec9" style:font-weight-asian="bold"/>
    </style:style>
    <style:style style:name="T7" style:family="text">
      <style:text-properties style:font-name="Arial" fo:font-weight="bold" officeooo:rsid="001a35bf" style:font-weight-asian="bold"/>
    </style:style>
    <style:style style:name="T8" style:family="text">
      <style:text-properties style:font-name="Arial" fo:font-weight="bold" officeooo:rsid="001b5067" style:font-weight-asian="bold"/>
    </style:style>
    <style:style style:name="T9" style:family="text">
      <style:text-properties style:font-name="Arial" fo:font-weight="bold" officeooo:rsid="0020ccf0" style:font-weight-asian="bold"/>
    </style:style>
    <style:style style:name="T10" style:family="text">
      <style:text-properties style:font-name="Arial" fo:font-weight="bold" officeooo:rsid="0028dcc5" style:font-weight-asian="bold"/>
    </style:style>
    <style:style style:name="T11" style:family="text">
      <style:text-properties style:font-name="Arial" officeooo:rsid="0015d96f"/>
    </style:style>
    <style:style style:name="T12" style:family="text">
      <style:text-properties style:font-name="Arial" fo:font-weight="normal" style:font-weight-asian="normal" style:font-weight-complex="normal"/>
    </style:style>
    <style:style style:name="T13" style:family="text">
      <style:text-properties style:font-name="Arial" fo:font-weight="normal" officeooo:rsid="00179ec9" style:font-weight-asian="normal" style:font-weight-complex="normal"/>
    </style:style>
    <style:style style:name="T14" style:family="text">
      <style:text-properties style:font-name="Arial" fo:font-weight="normal" officeooo:rsid="001b5067" style:font-weight-asian="normal" style:font-weight-complex="normal"/>
    </style:style>
    <style:style style:name="T15" style:family="text">
      <style:text-properties style:font-name="Arial" officeooo:rsid="001b5067"/>
    </style:style>
    <style:style style:name="T16" style:family="text">
      <style:text-properties style:font-name="Arial" fo:font-size="10pt" fo:font-weight="bold" style:font-size-asian="10pt" style:font-weight-asian="bold" style:font-size-complex="10pt"/>
    </style:style>
    <style:style style:name="T17" style:family="text">
      <style:text-properties style:font-name="Arial" fo:font-size="11pt" fo:font-weight="bold" style:font-size-asian="11pt" style:font-weight-asian="bold" style:font-size-complex="11pt"/>
    </style:style>
    <style:style style:name="T18" style:family="text">
      <style:text-properties style:font-name="Arial" fo:font-size="11pt" fo:font-weight="bold" officeooo:rsid="0021e770" style:font-size-asian="11pt" style:font-weight-asian="bold" style:font-size-complex="11pt"/>
    </style:style>
    <style:style style:name="T19" style:family="text">
      <style:text-properties style:font-name="Arial" officeooo:rsid="0021e7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2">TRGBCurves (Bundle 3.</text:span><text:span text:style-name="T10">2</text:span><text:span text:style-name="T2">)</text:span></text:p>
      <text:p text:style-name="P45"/>
      <text:p text:style-name="P45">Author: Francesco Savastano</text:p>
      <text:p text:style-name="P50"><text:span text:style-name="T2">Email: <text:s/></text:span><text:a xlink:type="simple" xlink:href="mailto:nwscomps@gmail.com" text:style-name="Internet_20_link" text:visited-style-name="Visited_20_Internet_20_Link"><text:span text:style-name="T3">nwscomps@gmail.com</text:span></text:a></text:p>
      <text:p text:style-name="P51"><text:span text:style-name="T3">W</text:span><text:span text:style-name="T2">ebsite: </text:span><text:a xlink:type="simple" xlink:href="http://fssoft.it/delphicomps.html" text:style-name="Internet_20_link" text:visited-style-name="Visited_20_Internet_20_Link"><text:span text:style-name="T2">http://fssoft.it/delphicomps.html</text:span></text:a></text:p>
      <text:p text:style-name="P52"/>
      <text:p text:style-name="P19"/>
      <text:p text:style-name="P45">General Description</text:p>
      <text:p text:style-name="P19"/>
      <text:p text:style-name="P38">TRGBCurves is a visual component that allows the creation, displaying and manipulation of tonal curves for image processing. By defining a curve for each Color channel and the Luminance channel of a Full Color picture, you will be able to define a correction for each tone of the channel range (0..255), therefore applying different amounts of change for each individual tone. Curves correction is a feature found in professional image and photo editors like Adobe Photoshop.</text:p>
      <text:p text:style-name="P19"/>
      <text:p text:style-name="P38">The component can <text:s/>apply the curves correction to both TBitmap and TIEBitmap encapsulated pictures.</text:p>
      <text:p text:style-name="P38">*TIEBitmap is the class used by the ImageEn graphics library. You can purchase a license of ImageEn at <text:s/>www.imageen.com</text:p>
      <text:p text:style-name="P19"/>
      <text:p text:style-name="P46">Features</text:p>
      <text:p text:style-name="P19"/>
      <text:p text:style-name="P38">If you are using the ImageEn library you can preview the changes and apply the curves directly on a TImageenView Component.</text:p>
      <text:p text:style-name="P38"/>
      <text:p text:style-name="P38">Very little coding is required from your side and the entire process of previewing and applying changes is handled automatically.</text:p>
      <text:p text:style-name="P38"/>
      <text:p text:style-name="P38"><text:s text:c="4"/>1· Edits each color channel and the luminance channel separately. Supports 8bits grayscale and full-color 24/32 bits TIEbitmap and TBitmap. </text:p>
      <text:p text:style-name="P38"/>
      <text:p text:style-name="P38"><text:s text:c="4"/>2· The user can add / remove / move the points that define the curve, using the mouse. The program can also do this by code. </text:p>
      <text:p text:style-name="P38"/>
      <text:p text:style-name="P38"><text:s text:c="4"/>3· A OnChangeCurve event notifies whenever something about the curves has changed. </text:p>
      <text:p text:style-name="P38"/>
      <text:p text:style-name="P38"><text:s text:c="4"/>4· Curves can be saved to a text file or to a Ini file and reloaded. From v. 3.2 support for loading and saving to Photoshop curves file format was added. </text:p>
      <text:p text:style-name="P38"/>
      <text:p text:style-name="P38"><text:s text:c="4"/>5· Curves may also be defined by mathematical formulas </text:p>
      <text:p text:style-name="P38"/>
      <text:p text:style-name="P38"><text:s text:c="4"/>6· In addition to displaying curves and applying them, the component can get the histogram from any image and graph it together with the curves. </text:p>
      <text:p text:style-name="P38"/>
      <text:p text:style-name="P38"><text:s text:c="4"/>7· When you register TRGBCurves to work together with a TImageenview component, any change to the curve will be previewed on the imageEn viewer component. Then you can apply the changes by using the provided methods of TRGBCurves. </text:p>
      <text:p text:style-name="P38"/>
      <text:p text:style-name="P15"><text:span text:style-name="T1"><text:s text:c="4"/></text:span><text:span text:style-name="T11">8</text:span><text:span text:style-name="T1">· It Integrates perfectly with ImageEn Layers and Selections as well. </text:span></text:p>
      <text:p text:style-name="P19"/>
      <text:p text:style-name="P19"/>
      <text:p text:style-name="P19"/>
      <text:p text:style-name="P46">Demo Project</text:p>
      <text:p text:style-name="P19"/>
      <text:p text:style-name="P38">The demo project included contains all the most important features of TRGBCurves. Please refer to the code to quickly learn how to use the component.</text:p>
      <text:p text:style-name="P47"/>
      <text:p text:style-name="P47"><text:soft-page-break/></text:p>
      <text:p text:style-name="P4">Included Files</text:p>
      <text:p text:style-name="P19"/>
      <text:p text:style-name="P19">NWSComps_RGBCurves.pas</text:p>
      <text:p text:style-name="P38">Contains the main class derived from TCustomControl</text:p>
      <text:p text:style-name="P19"/>
      <text:p text:style-name="P19">NWSComps_RGBCurves_Types.pas</text:p>
      <text:p text:style-name="P38">Contains Types definitions</text:p>
      <text:p text:style-name="P19"/>
      <text:p text:style-name="P19">NWSComps_RGBCurves_Math.pas</text:p>
      <text:p text:style-name="P38">Defines the ,mathematics needed to build the curves</text:p>
      <text:p text:style-name="P19"/>
      <text:p text:style-name="P19">NWSComps_IEUtils_Previews.pas</text:p>
      <text:p text:style-name="P38">Defines the ,classes needed to perform real time preview on a TImageEnView component</text:p>
      <text:p text:style-name="P19"/>
      <text:p text:style-name="P19">NWSComps_RGBCurves.inc</text:p>
      <text:p text:style-name="P38">Contains Compiler Directives Definitions</text:p>
      <text:p text:style-name="P19"/>
      <text:p text:style-name="P19"/>
      <text:p text:style-name="P19"/>
      <text:p text:style-name="P19"/>
      <text:p text:style-name="P19">********************NWSComps_RGBCurves_Types*********************</text:p>
      <text:p text:style-name="P19"/>
      <text:p text:style-name="P19"/>
      <text:p text:style-name="P19">TRGBCurves_Layout = class(TPersistent) //This class is not described here because it is used by the TRGBCurves Component in its properties and described later</text:p>
      <text:p text:style-name="P19"/>
      <text:p text:style-name="P19">TRGBCurves_CanMoveType = (cm_XY, cm_X_only, cm_Y_only, cm_CannotMove);</text:p>
      <text:p text:style-name="P19"/>
      <text:p text:style-name="P19">TRGBCurves_Channel_ViewMode = (fvmAll, fvmRed, fvmGreen, fvmBlue, fvmRGB);</text:p>
      <text:p text:style-name="P19"/>
      <text:p text:style-name="P19">TRGBCurves_FormulaCurve = function(x: single): single of object;</text:p>
      <text:p text:style-name="P19"/>
      <text:p text:style-name="P19">TRGBCurves_Editmode = (emNil, emMovePoint, emAddPoint);</text:p>
      <text:p text:style-name="P19"/>
      <text:p text:style-name="P19">TRGBCurves_Histogram = record active: boolean;</text:p>
      <text:p text:style-name="P19"/>
      <text:p text:style-name="P19">DisplayMode: TRGBCurves_HistogramDisplayMode; ScaleMode: TRGBCurves_HistogramScaleMode; RGBMode: TRGBCurves_HistogramRGBMode; Reds: array[0..255] of cardinal;</text:p>
      <text:p text:style-name="P19"/>
      <text:p text:style-name="P19">Greens: array[0..255] of cardinal; Blues: array[0..255] of cardinal;</text:p>
      <text:p text:style-name="P19">Grays: array[0..255] of cardinal;</text:p>
      <text:p text:style-name="P19">peakred, peakgreen, peakblue, peakgray: cardinal; avgred, avggreen, avgblue, avggray: cardinal;</text:p>
      <text:p text:style-name="P19"/>
      <text:p text:style-name="P19">TRGBCurves_HistogramDisplayMode = (HDmFilled, HDmTransparent, HDmLines);</text:p>
      <text:p text:style-name="P19"/>
      <text:p text:style-name="P19">TRGBCurves_HistogramRGBMode = (HmRed, HmGreen, HmBlue, HmGray, HmAll); TRGBCurves_HistogramScaleMode = (HSmLinear, HSmLog, HSmauto);</text:p>
      <text:p text:style-name="P19"/>
      <text:p text:style-name="P19">TRGBCurves_LUT = array[0..255] of byte;</text:p>
      <text:p text:style-name="P19"/>
      <text:p text:style-name="P19">TRGBCurves_Lutarray = array[0..3] of TRGBCurves_LUT;</text:p>
      <text:p text:style-name="P19"/>
      <text:p text:style-name="P19">TRGBCurves_Mode = (cmFormulaCurves, cmBuildCurves, cmNoCurves); //cmNoCurves is used for viewing just the histogram</text:p>
      <text:p text:style-name="P19"/>
      <text:p text:style-name="P19"><text:soft-page-break/>TRGBCurves_MovePointEvent = procedure(sender: TObject;</text:p>
      <text:p text:style-name="P19"/>
      <text:p text:style-name="P19">CurrentPoint: TPoint; CurrentPoint_Idx: integer;</text:p>
      <text:p text:style-name="P19">var CanMove: TRGBCurves_CanMoveType) of object;</text:p>
      <text:p text:style-name="P19"/>
      <text:p text:style-name="P19">TRGBCurves_Options =</text:p>
      <text:p text:style-name="P19"/>
      <text:p text:style-name="P19">Set of (Opt_Allow_AddPoints,</text:p>
      <text:p text:style-name="P19">Opt_Allow_RemovePoints,</text:p>
      <text:p text:style-name="P19">Opt_Allow_VinculatedPoints);</text:p>
      <text:p text:style-name="P19"/>
      <text:p text:style-name="P19">TRGBCurves_RGBmode = (cmAll, cmRed, cmGreen, cmBlue, cmRGB);</text:p>
      <text:p text:style-name="P47"/>
      <text:p text:style-name="P5">TRGBCurves_RGBSpace = (csRGB, csLum, csMixed);</text:p>
      <text:p text:style-name="P19"/>
      <text:p text:style-name="P19">TRGBCurves_Row = array[0..30000] of byte; tpRGBCurves_Row = ^TRGBCurves_row;</text:p>
      <text:p text:style-name="P19"/>
      <text:p text:style-name="P19"/>
      <text:p text:style-name="P19"/>
      <text:p text:style-name="P19">********************NWSComps_RGBCurves*********************</text:p>
      <text:p text:style-name="P19"/>
      <text:p text:style-name="P19"/>
      <text:p text:style-name="P19">Class TRGBCurves is a descendant of TCustomControl</text:p>
      <text:p text:style-name="P19"/>
      <text:p text:style-name="P19"/>
      <text:p text:style-name="P45">Properties</text:p>
      <text:p text:style-name="P19"/>
      <text:p text:style-name="P19">CurveMode: TRGBCurves_Mode</text:p>
      <text:p text:style-name="P19"/>
      <text:p text:style-name="P19">This property can have 2 values:</text:p>
      <text:p text:style-name="P19"/>
      <text:p text:style-name="P19"><text:s text:c="4"/>1· cmFormulaCurves </text:p>
      <text:p text:style-name="P19"><text:s text:c="4"/>2· cmBuildCurves </text:p>
      <text:p text:style-name="P19"/>
      <text:p text:style-name="P38">If you set it to cmFormulaCurves the component will show mathematical functions that you assign using the FormulaCurve_Red, …, FormulaCurve_Lum properties.</text:p>
      <text:p text:style-name="P38"/>
      <text:p text:style-name="P38">If you set it to cmBuildCurves the component will use interpolation to fit the points you provide by the interface in a similar way to the Photoshop curves.</text:p>
      <text:p text:style-name="P19"/>
      <text:p text:style-name="P19">Complementary Curves</text:p>
      <text:p text:style-name="P19"/>
      <text:p text:style-name="P38">When this option is enabled, the curves will be converted into their complementary curves, that is: the Red curve will become the Cyan curve, the Green curve will become the Magenta curve, the Blue curve will be the Yellow curve, and the Luminance curve will become the Black (or Ink) curve.</text:p>
      <text:p text:style-name="P38"/>
      <text:p text:style-name="P19">RGBMode: TRGBCurves_RGBMode</text:p>
      <text:p text:style-name="P19">This property can have 4 values:</text:p>
      <text:p text:style-name="P19"/>
      <text:p text:style-name="P19"><text:s text:c="4"/>1· cmAll </text:p>
      <text:p text:style-name="P19"><text:s text:c="4"/>2· cmRed </text:p>
      <text:p text:style-name="P19"><text:s text:c="4"/>3· cmGreen</text:p>
      <text:p text:style-name="P19"><text:s text:c="4"/>4· cmBlue </text:p>
      <text:p text:style-name="P19"/>
      <text:p text:style-name="P38">If you set RGBMode to any channel, you will see only the selected channel function/curve.</text:p>
      <text:p text:style-name="P38">If the mode is cmAll you will see all the functions if you are in cmFormulaCurves curve mode or you will see the luminance channel if you are in cmBuildCurves curve mode.</text:p>
      <text:p text:style-name="P19"><text:soft-page-break/></text:p>
      <text:p text:style-name="P20">RGBSpace: TRGBCurves_RGBSpace </text:p>
      <text:p text:style-name="P20"/>
      <text:p text:style-name="P39">This property can have 3 values:</text:p>
      <text:p text:style-name="P38"/>
      <text:p text:style-name="P15"><text:span text:style-name="T1"><text:s text:c="4"/></text:span><text:span text:style-name="T4">1· csRGB </text:span></text:p>
      <text:p text:style-name="P27"><text:s text:c="4"/>2· csLum </text:p>
      <text:p text:style-name="P15"><text:span text:style-name="T4"><text:s text:c="4"/>3· csMixed</text:span><text:span text:style-name="T1"> </text:span></text:p>
      <text:p text:style-name="P19"/>
      <text:p text:style-name="P12"><text:span text:style-name="T2"><text:s text:c="4"/></text:span><text:span text:style-name="T12">1- In RGB space, when changing the color channels, the Luminance will not be taken into account. </text:span></text:p>
      <text:p text:style-name="P38"/>
      <text:p text:style-name="P38"><text:s text:c="4"/>2- In Lum space the Luminance is taken into account, when changing the color channels. This space may tend to oversaturate the colors when brightness is increased, and to overdesaturate the colors when brightness is decreased. </text:p>
      <text:p text:style-name="P38"/>
      <text:p text:style-name="P12"><text:span text:style-name="T12"><text:s text:c="4"/>3- In Mixed space a combination of the two spaces above is used. The mixed amount is established by the ColorSpaceMixAmount property</text:span><text:span text:style-name="T2"> </text:span></text:p>
      <text:p text:style-name="P19"/>
      <text:p text:style-name="P19">ColorSpaceMixAmount: integer</text:p>
      <text:p text:style-name="P19">0-100</text:p>
      <text:p text:style-name="P38">Determines the amount of mixing between RGB Space and Lum Space</text:p>
      <text:p text:style-name="P19"/>
      <text:p text:style-name="P19">ExportDirectory:string</text:p>
      <text:p text:style-name="P19"/>
      <text:p text:style-name="P38">Default Folder's Name that shall be displayed in the Save Dialog when the user exports the curves to a file.</text:p>
      <text:p text:style-name="P19"/>
      <text:p text:style-name="P19">UseGDIPlus: Boolean</text:p>
      <text:p text:style-name="P38">If true the component will try to use GDIPlus to draw the graph elements. Requires</text:p>
      <text:p text:style-name="P38">ImageEn to work.</text:p>
      <text:p text:style-name="P19"/>
      <text:p text:style-name="P19">UseFastPreview: Boolean</text:p>
      <text:p text:style-name="P38">It enables / disables fast preview when working with TImageEnView.</text:p>
      <text:p text:style-name="P38">Use this if you are dealing with big pictures. It will calculate a less-accurate preview of the current changes, speeding up the preview process.</text:p>
      <text:p text:style-name="P19"/>
      <text:p text:style-name="P19">FastPreviewMode: TIEUtils_IEPreview_Mode</text:p>
      <text:p text:style-name="P38">Can be set to</text:p>
      <text:p text:style-name="P19"/>
      <text:p text:style-name="P13"><text:span text:style-name="T2">pm_FullUpdate: </text:span><text:span text:style-name="T12">use this when you have layers</text:span><text:span text:style-name="T2"> </text:span></text:p>
      <text:p text:style-name="P13"><text:span text:style-name="T2">pm_Flat: </text:span><text:span text:style-name="T12">use this only if you do not have layers</text:span></text:p>
      <text:p text:style-name="P12"><text:span text:style-name="T2">pm_Auto: </text:span><text:span text:style-name="T12">let the preview engine decide which mode to use. </text:span><text:span text:style-name="T13">Best Choice usually.</text:span></text:p>
      <text:p text:style-name="P19"/>
      <text:p text:style-name="P19">HistogramDisplayMode: TRGBCurves_HistogramDisplayMode</text:p>
      <text:p text:style-name="P19"/>
      <text:p text:style-name="P19">This property can have 3 values:</text:p>
      <text:p text:style-name="P19"/>
      <text:p text:style-name="P19">HdmFilled</text:p>
      <text:p text:style-name="P19">HdmTransparent</text:p>
      <text:p text:style-name="P19">HDmLines</text:p>
      <text:p text:style-name="P19"/>
      <text:p text:style-name="P38">It specifies the style of the Histogram</text:p>
      <text:p text:style-name="P38"/>
      <text:p text:style-name="P21">HistogramRGBMode: TRGBCurves_HistogramRGBMode </text:p>
      <text:p text:style-name="P40">This property can have 5 values:</text:p>
      <text:p text:style-name="P19"/>
      <text:p text:style-name="P19"><text:s text:c="4"/>1· HmRed </text:p>
      <text:p text:style-name="P19"><text:soft-page-break/><text:s text:c="4"/>2· HmGreen </text:p>
      <text:p text:style-name="P19"/>
      <text:p text:style-name="P19"><text:s text:c="4"/>3· HmBlue</text:p>
      <text:p text:style-name="P19"><text:s text:c="4"/>4· HmGray</text:p>
      <text:p text:style-name="P19"><text:s text:c="4"/>5· HmAll </text:p>
      <text:p text:style-name="P19"/>
      <text:p text:style-name="P19">The first 3 values represent the histogram for each color channel, the HmGray value represents the luminance channel and the HmAll will show all channels alltogether. </text:p>
      <text:p text:style-name="P19"/>
      <text:p text:style-name="P19">ShowHistogram</text:p>
      <text:p text:style-name="P19">Boolean</text:p>
      <text:p text:style-name="P19">Default Value is FALSE.</text:p>
      <text:p text:style-name="P19"/>
      <text:p text:style-name="P38">To show an histogram, you need to create one from a Tbitmap or a TIEBitmap using the GetHistogramfromBMP orGetHistogramfromIEBMP methods</text:p>
      <text:p text:style-name="P19"/>
      <text:p text:style-name="P19">GraphBackColor: TColor</text:p>
      <text:p text:style-name="P19"/>
      <text:p text:style-name="P38">You can choose the color of the Graph Background. Default is White.</text:p>
      <text:p text:style-name="P19"/>
      <text:p text:style-name="P12"><text:span text:style-name="T2">BorderPercent: </text:span><text:span text:style-name="T6">single</text:span><text:span text:style-name="T2"> (0-100)</text:span></text:p>
      <text:p text:style-name="P38">It’s the size of the border around the Graph Area, in percent. IT changes the</text:p>
      <text:p text:style-name="P38">BorderFixed property as well.</text:p>
      <text:p text:style-name="P19"/>
      <text:p text:style-name="P38">You can adjust it to enable more room for the graph labels.</text:p>
      <text:p text:style-name="P19"/>
      <text:p text:style-name="P19">BorderFixed: Cardinal</text:p>
      <text:p text:style-name="P19"/>
      <text:p text:style-name="P38">It’s the size of the border around the Graph Area.</text:p>
      <text:p text:style-name="P38"/>
      <text:p text:style-name="P38">You can adjust it to enable more room for the graph labels.</text:p>
      <text:p text:style-name="P19"/>
      <text:p text:style-name="P19">CurveColor_Lum: TColor</text:p>
      <text:p text:style-name="P19"/>
      <text:p text:style-name="P38">You can choose the color of the Luminance curve. Default is Black.</text:p>
      <text:p text:style-name="P19"/>
      <text:p text:style-name="P19">CurveColor_Red: TColor</text:p>
      <text:p text:style-name="P19"/>
      <text:p text:style-name="P38">You can choose the color of the Red curve. Default is Pure Red.</text:p>
      <text:p text:style-name="P19"/>
      <text:p text:style-name="P19">CurveColor_Green: TColor</text:p>
      <text:p text:style-name="P19"/>
      <text:p text:style-name="P38">You can choose the color of the Green curve. Default is Pure Green.</text:p>
      <text:p text:style-name="P19"/>
      <text:p text:style-name="P19">CurveColor_Blue: TColor</text:p>
      <text:p text:style-name="P19"/>
      <text:p text:style-name="P38">You can choose the color of the Blue curve. Default is Pure Blue.</text:p>
      <text:p text:style-name="P19"/>
      <text:p text:style-name="P19">GridColor: TColor</text:p>
      <text:p text:style-name="P19"/>
      <text:p text:style-name="P38">You can choose the color of the Grid Lines.</text:p>
      <text:p text:style-name="P19"/>
      <text:p text:style-name="P19">GridMedianLine_Color: TColor</text:p>
      <text:p text:style-name="P19"/>
      <text:p text:style-name="P38">You can choose the color of the median line of the grid.</text:p>
      <text:p text:style-name="P19"/>
      <text:p text:style-name="P19">LineSize: Cardinal</text:p>
      <text:p text:style-name="P19"><text:soft-page-break/></text:p>
      <text:p text:style-name="P38">It’s the size of the Line of the curve</text:p>
      <text:p text:style-name="P19"/>
      <text:p text:style-name="P19">LineOpacity: byte</text:p>
      <text:p text:style-name="P19">0-255</text:p>
      <text:p text:style-name="P38">Only works when GDIPlus is used (UseGDIPlus = TRUE).</text:p>
      <text:p text:style-name="P38"/>
      <text:p text:style-name="P38">You can set the amount of color opacity of the Line of a curve</text:p>
      <text:p text:style-name="P19"/>
      <text:p text:style-name="P19">PointSize: Cardinal</text:p>
      <text:p text:style-name="P19"/>
      <text:p text:style-name="P38">It’s the size of the control Point of the curve when Curve Mode =cmBuildCurves</text:p>
      <text:p text:style-name="P38"/>
      <text:p text:style-name="P19">PointOpacity: byte</text:p>
      <text:p text:style-name="P19">0-255</text:p>
      <text:p text:style-name="P38">Only works when Curve Mode =cmBuildCurves and GDIPlus is used (UseGDIPlus = TRUE).</text:p>
      <text:p text:style-name="P38">You can set the amount of color opacity of the inner part of a control point of a curve</text:p>
      <text:p text:style-name="P38"/>
      <text:p text:style-name="P19">PointFillStyle: TBrushstyle</text:p>
      <text:p text:style-name="P38">Only works when Curve Mode =cmBuildCurves .</text:p>
      <text:p text:style-name="P19"/>
      <text:p text:style-name="P38">You can set the style of the inner filling of a control point of a curve</text:p>
      <text:p text:style-name="P38"/>
      <text:p text:style-name="P19">ShowVerticalCaptions: Boolean</text:p>
      <text:p text:style-name="P38">You can hide/show the labels for the Y axis of the graph.</text:p>
      <text:p text:style-name="P38">This is useful if you want to display an histogram without the curves, since the histogram has no vertical labels.</text:p>
      <text:p text:style-name="P19"/>
      <text:p text:style-name="P19">ShowMedianline: Boolean</text:p>
      <text:p text:style-name="P38">Default is TRUE.</text:p>
      <text:p text:style-name="P19"/>
      <text:p text:style-name="P38">The median dash-dotted line is displayed to visualize the discard of the curve from the no-change position.</text:p>
      <text:p text:style-name="P19"/>
      <text:p text:style-name="P22">Font: Tfont </text:p>
      <text:p text:style-name="P22"/>
      <text:p text:style-name="P41">Choose the font to display text in the graph.</text:p>
      <text:p text:style-name="P19"/>
      <text:p text:style-name="P19">Points: TRGBCurves_Pointslist</text:p>
      <text:p text:style-name="P19"/>
      <text:p text:style-name="P44">The list of Currently Displayed points</text:p>
      <text:p text:style-name="P19"/>
      <text:p text:style-name="P19">InterpLinear_Min: integer</text:p>
      <text:p text:style-name="P12"><text:span text:style-name="T2">Default is </text:span><text:span text:style-name="T7">1</text:span><text:span text:style-name="T2">5.</text:span></text:p>
      <text:p text:style-name="P19"/>
      <text:p text:style-name="P38">Changes the least amount of local linearization that should be applied to the interpolated curve. Local linearization makes the curve shape more stable, however it tends to segment the curve.</text:p>
      <text:p text:style-name="P19"/>
      <text:p text:style-name="P19">InterpLinear_Max: integer</text:p>
      <text:p text:style-name="P19">Default is 65.</text:p>
      <text:p text:style-name="P19"/>
      <text:p text:style-name="P38">Changes the maximum amount of local linearization that can be applied to the interpolated curve.Local linearization makes the curve shape more stable, however it tends to segment the curve.</text:p>
      <text:p text:style-name="P19"/>
      <text:p text:style-name="P19"/>
      <text:p text:style-name="P12"><text:span text:style-name="T2">M</text:span><text:span text:style-name="T8">in</text:span><text:span text:style-name="T2">FittingX: Integer </text:span><text:span text:style-name="T8">(Read only)</text:span></text:p>
      <text:p text:style-name="P19"/>
      <text:p text:style-name="P42"><text:soft-page-break/>First X Coordinate for which the Curve value is Minimum (Y=0).</text:p>
      <text:p text:style-name="P19"/>
      <text:p text:style-name="P14"><text:span text:style-name="T2">M</text:span><text:span text:style-name="T8">ax</text:span><text:span text:style-name="T2">FittingX: Integer </text:span><text:span text:style-name="T8">(Read only)</text:span></text:p>
      <text:p text:style-name="P23"/>
      <text:p text:style-name="P16"><text:span text:style-name="T1">First X Coordinate for which the Curve value is </text:span><text:span text:style-name="T15">Maximum</text:span><text:span text:style-name="T1"> (Y=</text:span><text:span text:style-name="T15">255</text:span><text:span text:style-name="T1">).</text:span></text:p>
      <text:p text:style-name="P19"/>
      <text:p text:style-name="P19">FormulaCurve_Red: TRGBCurves_FormulaCurve</text:p>
      <text:p text:style-name="P19"/>
      <text:p text:style-name="P38">Assign to this property the function that you want to use for the RED channel when Curve Mode = cmFormulaCurves</text:p>
      <text:p text:style-name="P19"/>
      <text:p text:style-name="P19">FormulaCurve_Green: TRGBCurves_FormulaCurve</text:p>
      <text:p text:style-name="P19"/>
      <text:p text:style-name="P38">Assign to this property the function that you want to use for the GREEN channel when Curve Mode = cmFormulaCurves</text:p>
      <text:p text:style-name="P5"/>
      <text:p text:style-name="P19"/>
      <text:p text:style-name="P19">FormulaCurve_Blue: TRGBCurves_FormulaCurve</text:p>
      <text:p text:style-name="P19"/>
      <text:p text:style-name="P38">Assign to this property the function that you want to use for the BLUE channel when Curve Mode = cmFormulaCurves</text:p>
      <text:p text:style-name="P19"/>
      <text:p text:style-name="P19">FormulaCurve_Lum: TRGBCurves_FormulaCurve</text:p>
      <text:p text:style-name="P19"/>
      <text:p text:style-name="P38">Assign to this property the function that you want to use for the LUMINANCE channel when Curve Mode = cmFormulaCurves</text:p>
      <text:p text:style-name="P19"/>
      <text:p text:style-name="P19"/>
      <text:p text:style-name="P45">Methods</text:p>
      <text:p text:style-name="P19"/>
      <text:p text:style-name="P46">ApplyCurvesToBitmap</text:p>
      <text:p text:style-name="P28">Parameters: </text:p>
      <text:p text:style-name="P28"/>
      <text:p text:style-name="P23">thebitmap : Tbitmap</text:p>
      <text:p text:style-name="P19"/>
      <text:p text:style-name="P12"><text:span text:style-name="T12">Apply the Curves </text:span><text:span text:style-name="T14">to the Tbitmap </text:span><text:span text:style-name="T5">(</text:span><text:span text:style-name="T4">Pixel format must be supported.</text:span><text:span text:style-name="T5">)</text:span></text:p>
      <text:p text:style-name="P19"/>
      <text:p text:style-name="P19"/>
      <text:p text:style-name="P46">ApplyCurvesToIEBitmap</text:p>
      <text:p text:style-name="P28">Parameters: </text:p>
      <text:p text:style-name="P28"/>
      <text:p text:style-name="P14"><text:span text:style-name="T2">the</text:span><text:span text:style-name="T8">IEB</text:span><text:span text:style-name="T2">itmap : T</text:span><text:span text:style-name="T8">IE</text:span><text:span text:style-name="T2">bitmap</text:span></text:p>
      <text:p text:style-name="P28">Mask:TIEMask</text:p>
      <text:p text:style-name="P28">EditeRect:TRect</text:p>
      <text:p text:style-name="P28">bUseMask: boolean</text:p>
      <text:p text:style-name="P23"/>
      <text:p text:style-name="P14"><text:span text:style-name="T12">Apply the Curves </text:span><text:span text:style-name="T14">to the TIEbitmap </text:span><text:span text:style-name="T5">(</text:span><text:span text:style-name="T4">Pixel format must be supported.</text:span><text:span text:style-name="T5">)</text:span></text:p>
      <text:p text:style-name="P1"/>
      <text:p text:style-name="P48">The Mask is a ImageEn Selection that defines any area inside the TIEBitmap in which the changes should be applied.</text:p>
      <text:p text:style-name="P2"/>
      <text:p text:style-name="P9">The EditedRect is the rectangular crop area in which the changes should be applied</text:p>
      <text:p text:style-name="P19"/>
      <text:p text:style-name="P38">bUseMask defines whether to consider the Mask or ignore it.</text:p>
      <text:p text:style-name="P19"/>
      <text:p text:style-name="P19"/>
      <text:p text:style-name="P46">ApplyCurvesToImageenView</text:p>
      <text:p text:style-name="P28"><text:soft-page-break/>parameters:</text:p>
      <text:p text:style-name="P23"><text:s/>theieview : TimageenView</text:p>
      <text:p text:style-name="P19"/>
      <text:p text:style-name="P38">Apply the Curves to a TImageEnView of choice. Current layer will be affected. If a selection (TIEMask) is defined only selected parts will be affected by changes.</text:p>
      <text:p text:style-name="P38">Pixel format must be supported.</text:p>
      <text:p text:style-name="P19"/>
      <text:p text:style-name="P46">IEView_Preview_Register</text:p>
      <text:p text:style-name="P29">Parameters:</text:p>
      <text:p text:style-name="P29"/>
      <text:p text:style-name="P19">theieview : TimageenView</text:p>
      <text:p text:style-name="P19"/>
      <text:p text:style-name="P38">Registering a TImageenView component to work in conjunction with TRGBCurves will automatically reflect any changes made to the curves on the registered TImageEnView display.</text:p>
      <text:p text:style-name="P38"/>
      <text:p text:style-name="P38">The preview will affect the current layer and will take care of any selection (if present). Every changes in the display (zooming, panning, selecting layers, creating selections) will instantaneously update the preview.</text:p>
      <text:p text:style-name="P38"/>
      <text:p text:style-name="P46">IEView_Preview_UnRegister</text:p>
      <text:p text:style-name="P29">Parameters:</text:p>
      <text:p text:style-name="P29">None</text:p>
      <text:p text:style-name="P29"/>
      <text:p text:style-name="P38">After a TimageenView component has been registered for preview by the IEView_Preview_Register method, you will need to unregister it by this command. Unregistering the component will stop TRGBCurves from updating the TImageenview display.</text:p>
      <text:p text:style-name="P19"/>
      <text:p text:style-name="P46">IEView_Preview_ApplyChanges</text:p>
      <text:p text:style-name="P30">Parameters:</text:p>
      <text:p text:style-name="P30"/>
      <text:p text:style-name="P24">theieview : TimageenView</text:p>
      <text:p text:style-name="P19"/>
      <text:p text:style-name="P38">Apply the Curves to the TImageEnView that was registered for the previews. The last changes previewed will be applied on the current layer and If a selection (TIEMask) is defined only selected parts will be affected by changes.</text:p>
      <text:p text:style-name="P19"/>
      <text:p text:style-name="P19">GetHistogramfromBMP</text:p>
      <text:p text:style-name="P30">Parameters:</text:p>
      <text:p text:style-name="P19"/>
      <text:p text:style-name="P19">thebitmap : Tbitmap</text:p>
      <text:p text:style-name="P19"/>
      <text:p text:style-name="P38">Loads the histogram from a Tbitmap object.</text:p>
      <text:p text:style-name="P19"/>
      <text:p text:style-name="P46">GetHistogramfromIEBMP</text:p>
      <text:p text:style-name="P31">Parameters:</text:p>
      <text:p text:style-name="P31"/>
      <text:p text:style-name="P19">theiIEbmp : TIEBitmap</text:p>
      <text:p text:style-name="P19"/>
      <text:p text:style-name="P38">Loads the histogram from a TIEBitmap object.</text:p>
      <text:p text:style-name="P19"/>
      <text:p text:style-name="P46">GetHistogramfromImageEnView</text:p>
      <text:p text:style-name="P31">Parameters:</text:p>
      <text:p text:style-name="P31"/>
      <text:p text:style-name="P19">theieview : TimageenView</text:p>
      <text:p text:style-name="P19"/>
      <text:p text:style-name="P38">Loads the histogram from a TimageenView object.</text:p>
      <text:p text:style-name="P19"/>
      <text:p text:style-name="P46"><text:soft-page-break/>ExportCurves</text:p>
      <text:p text:style-name="P31">Parameters:</text:p>
      <text:p text:style-name="P31">None</text:p>
      <text:p text:style-name="P19"/>
      <text:p text:style-name="P19">Opens the save dialog to export curves to text files.</text:p>
      <text:p text:style-name="P19"/>
      <text:p text:style-name="P19"/>
      <text:p text:style-name="P46">ImportCurves: Boolean</text:p>
      <text:p text:style-name="P31">Parameters:</text:p>
      <text:p text:style-name="P31">None</text:p>
      <text:p text:style-name="P19"/>
      <text:p text:style-name="P38">Opens the open dialog to import curves from text files. Returns True if any curve is imported.</text:p>
      <text:p text:style-name="P19"/>
      <text:p text:style-name="P46">SaveCurves_ToFile</text:p>
      <text:p text:style-name="P31">Parameters:</text:p>
      <text:p text:style-name="P19"/>
      <text:p text:style-name="P19">theCurvesfile: string</text:p>
      <text:p text:style-name="P19"/>
      <text:p text:style-name="P38">Saves the curves to the specified file name.</text:p>
      <text:p text:style-name="P19"/>
      <text:p text:style-name="P46">LoadCurves_FromFile</text:p>
      <text:p text:style-name="P32">parameters:</text:p>
      <text:p text:style-name="P19"/>
      <text:p text:style-name="P19">theCurvesfile: string</text:p>
      <text:p text:style-name="P19"/>
      <text:p text:style-name="P38">Load the curves from the specified file name</text:p>
      <text:p text:style-name="P19"/>
      <text:p text:style-name="P46">PS_SaveCurves_ToFile</text:p>
      <text:p text:style-name="P32">Parameters:</text:p>
      <text:p text:style-name="P32"/>
      <text:p text:style-name="P19">theCurvesfile: string</text:p>
      <text:p text:style-name="P19"/>
      <text:p text:style-name="P38">Saves the curves to the specified file name in Photoshop format.</text:p>
      <text:p text:style-name="P19"/>
      <text:p text:style-name="P46">PS_LoadCurves_FromFile: Boolean</text:p>
      <text:p text:style-name="P32">Parameters:</text:p>
      <text:p text:style-name="P19"/>
      <text:p text:style-name="P19">theCurvesfile: string</text:p>
      <text:p text:style-name="P19"/>
      <text:p text:style-name="P38">Load the curves from the specified file name in Photoshop format</text:p>
      <text:p text:style-name="P19"/>
      <text:p text:style-name="P46">ExportCurvesToINI</text:p>
      <text:p text:style-name="P32">Parameters:</text:p>
      <text:p text:style-name="P32"/>
      <text:p text:style-name="P19">Inifile: Tinifile </text:p>
      <text:p text:style-name="P19">IniSection: string </text:p>
      <text:p text:style-name="P19"/>
      <text:p text:style-name="P38">Exports curves to INI files. </text:p>
      <text:p text:style-name="P38"/>
      <text:p text:style-name="P46">ImportCurvesFromINI</text:p>
      <text:p text:style-name="P32">Parameters:</text:p>
      <text:p text:style-name="P32"/>
      <text:p text:style-name="P25">Inifile: Tinifile</text:p>
      <text:p text:style-name="P12"><text:span text:style-name="T9">I</text:span><text:span text:style-name="T2">niSection: string</text:span></text:p>
      <text:p text:style-name="P19"/>
      <text:p text:style-name="P38">Imports curves from INI files.</text:p>
      <text:p text:style-name="P19"/>
      <text:p text:style-name="P46"><text:soft-page-break/>ResetPoints</text:p>
      <text:p text:style-name="P32">Parameters:</text:p>
      <text:p text:style-name="P32">none</text:p>
      <text:p text:style-name="P19"/>
      <text:p text:style-name="P38">Reset all curves by resetting the values of all the control points to default.</text:p>
      <text:p text:style-name="P38">Only works with Curve Mode = cmBuildCurves</text:p>
      <text:p text:style-name="P19"/>
      <text:p text:style-name="P46">SetthePoint</text:p>
      <text:p text:style-name="P32">Parameters:</text:p>
      <text:p text:style-name="P19"/>
      <text:p text:style-name="P19">ix: integer </text:p>
      <text:p text:style-name="P19">thepoint: TRGBCurves_doublepoint </text:p>
      <text:p text:style-name="P19"/>
      <text:p text:style-name="P38">Set the value of the point at the position ix of the current curve Only works with Curve Mode = cmBuildCurves </text:p>
      <text:p text:style-name="P19"/>
      <text:p text:style-name="P46">SetCurrentPoint</text:p>
      <text:p text:style-name="P33">Parameters:</text:p>
      <text:p text:style-name="P19"/>
      <text:p text:style-name="P19">thepoint: TRGBCurves_doublepoint</text:p>
      <text:p text:style-name="P19"/>
      <text:p text:style-name="P38">Set the value of the current point (the one that was last selected, that is moved or created) of the current curve</text:p>
      <text:p text:style-name="P38">Only works with Curve Mode = cmBuildCurves</text:p>
      <text:p text:style-name="P19"/>
      <text:p text:style-name="P18"><text:span text:style-name="T2">GetCurrentPoint: </text:span><text:span text:style-name="T16">TRGBCurves_double</text:span></text:p>
      <text:p text:style-name="P34">Parameters:</text:p>
      <text:p text:style-name="P35">none</text:p>
      <text:p text:style-name="P19"/>
      <text:p text:style-name="P38">Get the current point (the one that was last selected, that is moved or created) of the </text:p>
      <text:p text:style-name="P38">current curve</text:p>
      <text:p text:style-name="P38"/>
      <text:p text:style-name="P38">Only works with Curve Mode = cmBuildCurves</text:p>
      <text:p text:style-name="P19"/>
      <text:p text:style-name="P18"><text:span text:style-name="T2">GetCurrentPoint_Idx: </text:span><text:span text:style-name="T16">integer</text:span></text:p>
      <text:p text:style-name="P35">Parameters:</text:p>
      <text:p text:style-name="P35">none</text:p>
      <text:p text:style-name="P19"/>
      <text:p text:style-name="P38">Get the Index of the current point (the one that was last selected, that is moved or created) of the current curve. Only works with Curve Mode = cmBuildCurves</text:p>
      <text:p text:style-name="P19"/>
      <text:p text:style-name="P46">SetCurrentPoint_Idx</text:p>
      <text:p text:style-name="P35">Parameters:</text:p>
      <text:p text:style-name="P35"/>
      <text:p text:style-name="P38">Set the Index of the current point (the one that was last selected, that is moved or created) of the current curve. Only works with Curve Mode = cmBuildCurves</text:p>
      <text:p text:style-name="P19"/>
      <text:p text:style-name="P46">AddPoint</text:p>
      <text:p text:style-name="P35">Parameters:</text:p>
      <text:p text:style-name="P35"/>
      <text:p text:style-name="P7">thepoint: TRGBCurves_doublepoint</text:p>
      <text:p text:style-name="P19"/>
      <text:p text:style-name="P38">Add a point to the curve. Only works with Curve Mode = cmBuildCurves</text:p>
      <text:p text:style-name="P47"/>
      <text:p text:style-name="P5"/>
      <text:p text:style-name="P11">RemovePoint</text:p>
      <text:p text:style-name="P35"><text:soft-page-break/>Parameters:</text:p>
      <text:p text:style-name="P26">ix: integer</text:p>
      <text:p text:style-name="P26"/>
      <text:p text:style-name="P43">Remove the point at the position ix of the current curve. Only works with Curve Mode = cmBuildCurves</text:p>
      <text:p text:style-name="P47"/>
      <text:p text:style-name="P11">RemovePoint_Current</text:p>
      <text:p text:style-name="P35">Parameters:</text:p>
      <text:p text:style-name="P35">None</text:p>
      <text:p text:style-name="P35"/>
      <text:p text:style-name="P43">Remove the current point (the one that was last moved or created) of the current curve. Only works with Curve Mode = cmBuildCurves</text:p>
      <text:p text:style-name="P47"/>
      <text:p text:style-name="P3"><text:span text:style-name="T17">PointExists: </text:span><text:span text:style-name="T18">b</text:span><text:span text:style-name="T2">oolean</text:span></text:p>
      <text:p text:style-name="P35">Parameters:</text:p>
      <text:p text:style-name="P35"/>
      <text:p text:style-name="P6">const thepoint: TRGBCurves_doublepoint</text:p>
      <text:p text:style-name="P26"/>
      <text:p text:style-name="P17"><text:span text:style-name="T1">Retu</text:span><text:span text:style-name="T19">rns</text:span><text:span text:style-name="T1"> TRUE if the specified point already exists in the current curve. Only works with Curve Mode = cmBuildCurves</text:span></text:p>
      <text:p text:style-name="P47"/>
      <text:p text:style-name="P3"><text:span text:style-name="T17">ExportLUT: </text:span><text:span text:style-name="T2">TRGBCurves_LUT<text:tab/>Func</text:span></text:p>
      <text:p text:style-name="P8">Parameters:</text:p>
      <text:p text:style-name="P36"/>
      <text:p text:style-name="P19">mode: TRGBCurves_RGBMode</text:p>
      <text:p text:style-name="P19"/>
      <text:p text:style-name="P38">The result of this function is a Lookup Table. It contains the ordered curve values for</text:p>
      <text:p text:style-name="P38">each of the [0--255] tones of a channel. The channel is specified by the Mode</text:p>
      <text:p text:style-name="P19"/>
      <text:p text:style-name="P19"/>
      <text:p text:style-name="P12"><text:span text:style-name="T17">ExportLUTs</text:span><text:span text:style-name="T2"><text:tab/> <text:s text:c="13"/></text:span></text:p>
      <text:p text:style-name="P37">Parameters:</text:p>
      <text:p text:style-name="P19"/>
      <text:p text:style-name="P19"/>
      <text:p text:style-name="P19">var BGRALUTarray: TRGBCurves_Lutarray </text:p>
      <text:p text:style-name="P19">var GrayLUT: TRGBCurves_LUT </text:p>
      <text:p text:style-name="P19"/>
      <text:p text:style-name="P19"/>
      <text:p text:style-name="P38">The returned parameters contain the Lookup Tables for all channels. GrayLut is the luminance channel. </text:p>
      <text:p text:style-name="P19"/>
      <text:p text:style-name="P19"/>
      <text:p text:style-name="P45">Events</text:p>
      <text:p text:style-name="P19"/>
      <text:p text:style-name="P12"><text:span text:style-name="T17">OnChangeCurve</text:span><text:span text:style-name="T2">: TNotifyEvent</text:span></text:p>
      <text:p text:style-name="P38">Use this event to be notified whenever a change happens to the curves.</text:p>
      <text:p text:style-name="P19"/>
      <text:p text:style-name="P46">OnChangeRGBMode</text:p>
      <text:p text:style-name="P38">Use this event to be notified whenever the RGBMode changes</text:p>
      <text:p text:style-name="P38"/>
      <text:p text:style-name="P12"><text:span text:style-name="T17">OnMovePoint</text:span><text:span text:style-name="T2">: TRGBCurves_MovePointEvent</text:span></text:p>
      <text:p text:style-name="P38">Use this event to be notified whenever a Point has been moved</text:p>
      <text:p text:style-name="P19"/>
      <text:p text:style-name="P12"><text:span text:style-name="T17">OnMovingPoint</text:span><text:span text:style-name="T2">: TRGBCurves_MovingPointEvent</text:span></text:p>
      <text:p text:style-name="P38">Use this event to be notified whenever a Point is being moved</text:p>
      <text:p text:style-name="P19"/>
      <text:p text:style-name="P19">OnAddPoint: TRGBCurves_Point_Event</text:p>
      <text:p text:style-name="P10">Use this event to be notified whenever a Point has been added</text:p>
      <text:p text:style-name="P38"><text:soft-page-break/></text:p>
      <text:p text:style-name="P18"><text:span text:style-name="T2">OnRemovePoint: </text:span><text:span text:style-name="T16">TRGBCurves_Point_Event</text:span></text:p>
      <text:p text:style-name="P38">Use this event to be notified whenever a Point has been removed</text:p>
      <text:p text:style-name="P38"/>
      <text:p text:style-name="P18"><text:span text:style-name="T2">OnCustomDraw_Labels_HorzAxis: </text:span><text:span text:style-name="T16">TRGBCurves_CustomDrawLabelEvent</text:span></text:p>
      <text:p text:style-name="P38">Use this event to be notified whenever the Labels of the horizontal axis are redrawn</text:p>
      <text:p text:style-name="P19"/>
      <text:p text:style-name="P12"><text:span text:style-name="T17">OnCustomDraw_Labels_VertAxis</text:span><text:span text:style-name="T2">: TRGBCurves_CustomDrawLabelEvent</text:span></text:p>
      <text:p text:style-name="P38">Use this event to be notified whenever the Labels of the vertical axis are redrawn</text:p>
      <text:p text:style-name="P38"/>
      <text:p text:style-name="P19">OnCustomDraw_Point: TRGBCurves_CustomDrawPointEvent</text:p>
      <text:p text:style-name="P38">Use this event to be notified whenever a Point is redrawn</text:p>
      <text:p text:style-name="P19"/>
      <text:p text:style-name="P19">OnIEView_BeforePreview: TnotifyEvent</text:p>
      <text:p text:style-name="P38">Use this event to be notified before the preview is displayed on the Imageenview</text:p>
      <text:p text:style-name="P38">component</text:p>
      <text:p text:style-name="P19"/>
      <text:p text:style-name="P19">OnIEView_AfterPreview: TnotifyEvent</text:p>
      <text:p text:style-name="P38">Use this event to be notified after the preview is displayed on the Imageenview compo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color="#0000ff" style:font-name="Arial" fo:font-family="Arial" style:font-family-generic="roman" style:font-pitch="variable" fo:font-size="12pt" style:text-underline-style="solid" style:text-underline-width="auto" style:text-underline-color="font-color"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000ff" style:font-name="Arial" fo:font-family="Arial" style:font-family-generic="roman" style:font-pitch="variable" fo:font-size="11.5pt" style:text-underline-style="solid" style:text-underline-width="auto" style:text-underline-color="font-color" style:font-size-asian="1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46cm" fo:margin-bottom="2.54cm" fo:margin-left="2.004cm" fo:margin-right="2.011cm" style:writing-mode="lr-tb" style:layout-grid-color="#c0c0c0" style:layout-grid-lines="2345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1.626cm" fo:margin-left="2.004cm" fo:margin-right="2.505cm" style:writing-mode="lr-tb" style:layout-grid-color="#c0c0c0" style:layout-grid-lines="243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972cm" fo:margin-bottom="2.54cm" fo:margin-left="2.011cm" fo:margin-right="2.893cm" style:writing-mode="lr-tb" style:layout-grid-color="#c0c0c0" style:layout-grid-lines="2342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967cm" fo:margin-bottom="1.767cm" fo:margin-left="2.205cm" fo:margin-right="3.246cm" style:writing-mode="lr-tb" style:layout-grid-color="#c0c0c0" style:layout-grid-lines="242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972cm" fo:margin-bottom="1.577cm" fo:margin-left="2.205cm" fo:margin-right="2.893cm" style:writing-mode="lr-tb" style:layout-grid-color="#c0c0c0" style:layout-grid-lines="2439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7cm" fo:margin-bottom="1.919cm" fo:margin-left="2.223cm" fo:margin-right="3.598cm" style:writing-mode="lr-tb" style:layout-grid-color="#c0c0c0" style:layout-grid-lines="240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54cm" fo:margin-bottom="2.54cm" fo:margin-left="2.223cm" fo:margin-right="3.563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931cm" fo:margin-bottom="1.408cm" fo:margin-left="1.976cm" fo:margin-right="2.858cm" style:writing-mode="lr-tb" style:layout-grid-color="#c0c0c0" style:layout-grid-lines="246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972cm" fo:margin-bottom="1.901cm" fo:margin-left="1.976cm" fo:margin-right="2.858cm" style:writing-mode="lr-tb" style:layout-grid-color="#c0c0c0" style:layout-grid-lines="2406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972cm" fo:margin-bottom="1.84cm" fo:margin-left="1.976cm" fo:margin-right="2.858cm" style:writing-mode="lr-tb" style:layout-grid-color="#c0c0c0" style:layout-grid-lines="2412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1.972cm" fo:margin-bottom="1.871cm" fo:margin-left="1.976cm" fo:margin-right="2.858cm" style:writing-mode="lr-tb" style:layout-grid-color="#c0c0c0" style:layout-grid-lines="2409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1.972cm" fo:margin-bottom="2.54cm" fo:margin-left="2.011cm" fo:margin-right="3.034cm" style:writing-mode="lr-tb" style:layout-grid-color="#c0c0c0" style:layout-grid-lines="2342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style:master-page style:name="Converted10" style:page-layout-name="Mpm11"/>
    <style:master-page style:name="Converted11"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3T14:48:11.009000000</dc:date>
    <meta:editing-duration>PT49M1S</meta:editing-duration>
    <meta:editing-cycles>16</meta:editing-cycles>
    <meta:generator>LibreOffice/6.0.3.2$Windows_X86_64 LibreOffice_project/8f48d515416608e3a835360314dac7e47fd0b821</meta:generator>
    <meta:document-statistic meta:table-count="0" meta:image-count="0" meta:object-count="0" meta:page-count="12" meta:paragraph-count="340" meta:word-count="2489" meta:character-count="17222" meta:non-whitespace-character-count="14916"/>
  </office:meta>
</office:document-meta>
</file>