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10pt" fo:font-weight="normal" officeooo:paragraph-rsid="0016b8b7" style:font-size-asian="10pt" style:font-weight-asian="normal" style:font-size-complex="10pt"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0pt" fo:font-weight="normal" officeooo:paragraph-rsid="001dae0a" style:font-size-asian="10pt" style:font-weight-asian="normal"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color="#333333" style:font-name="Arial" fo:font-size="10pt" fo:font-weight="bold" style:font-size-asian="10pt" style:font-weight-asian="bold" style:font-size-complex="10pt"/>
    </style:style>
    <style:style style:name="P6" style:family="paragraph" style:parent-style-name="Standard">
      <style:paragraph-properties fo:margin-left="0cm" fo:margin-right="0cm" fo:text-align="start" style:justify-single-word="false" fo:text-indent="0cm" style:auto-text-indent="false"/>
      <style:text-properties fo:color="#333333" style:font-name="Arial"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color="#333333" style:font-name="Arial" fo:font-size="10pt" fo:font-weight="bold" officeooo:rsid="00181adb" officeooo:paragraph-rsid="00181adb" style:font-size-asian="10pt" style:font-weight-asian="bold" style:font-size-complex="10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color="#333333" style:font-name="Arial"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color="#333333" style:font-name="Arial" fo:font-size="10pt" fo:font-weight="normal" officeooo:rsid="00181adb" officeooo:paragraph-rsid="00181adb" style:font-size-asian="10pt" style:font-weight-asian="normal"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333333" style:font-name="Arial" fo:font-size="10pt" fo:font-weight="normal" officeooo:rsid="001abc24" officeooo:paragraph-rsid="001abc24" style:font-size-asian="10pt" style:font-weight-asian="normal"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color="#333333" style:font-name="Arial" fo:font-size="10pt" fo:font-weight="normal" officeooo:rsid="001b4e2a" officeooo:paragraph-rsid="001b4e2a"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333333" style:font-name="Arial" fo:font-size="10pt" fo:font-weight="normal" officeooo:rsid="0020b097" officeooo:paragraph-rsid="0020b097" style:font-size-asian="8.75pt" style:font-weight-asian="normal" style:font-size-complex="10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333333" style:font-name="Arial" fo:font-size="10pt" fo:font-style="italic" fo:font-weight="bold" style:font-size-asian="10pt" style:font-style-asian="italic" style:font-weight-asian="bold" style:font-size-complex="10pt" style:font-style-complex="italic"/>
    </style:style>
    <style:style style:name="P14" style:family="paragraph" style:parent-style-name="Standard">
      <style:paragraph-properties fo:margin-left="0cm" fo:margin-right="0cm" fo:text-align="start" style:justify-single-word="false" fo:text-indent="0cm" style:auto-text-indent="false"/>
      <style:text-properties fo:color="#333333"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333333" style:font-name="Arial" fo:font-size="10pt" fo:font-style="normal" fo:font-weight="normal" officeooo:rsid="001abc24"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333333" style:font-name="Arial" fo:font-size="12pt" fo:font-weight="bold" style:font-size-asian="12pt" style:font-weight-asian="bold" style:font-size-complex="12pt"/>
    </style:style>
    <style:style style:name="P17" style:family="paragraph" style:parent-style-name="Standard">
      <style:paragraph-properties fo:margin-left="0cm" fo:margin-right="0cm" fo:text-align="start" style:justify-single-word="false" fo:text-indent="0cm" style:auto-text-indent="false"/>
      <style:text-properties fo:color="#333333" style:font-name="Arial" fo:font-size="12pt" style:text-underline-style="solid" style:text-underline-width="auto" style:text-underline-color="font-color" fo:font-weight="bold" style:font-size-asian="12pt" style:font-weight-asian="bold" style:font-size-complex="12pt"/>
    </style:style>
    <style:style style:name="P18" style:family="paragraph" style:parent-style-name="Standard">
      <style:paragraph-properties fo:margin-left="0cm" fo:margin-right="0cm" fo:text-align="start" style:justify-single-word="false" fo:text-indent="0cm" style:auto-text-indent="false"/>
      <style:text-properties fo:color="#333333" style:font-name="Arial" fo:font-size="12pt" fo:font-weight="normal" officeooo:rsid="001dae0a"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198cec" style:font-size-asian="10pt" style:font-weight-asian="bold" style:font-size-complex="10pt"/>
    </style:style>
    <style:style style:name="P20" style:family="paragraph" style:parent-style-name="Standard" style:master-page-name="Standard">
      <style:paragraph-properties fo:margin-left="0cm" fo:margin-right="0cm" fo:text-align="start" style:justify-single-word="false" fo:text-indent="0cm" style:auto-text-indent="false" style:page-number="auto"/>
      <style:text-properties fo:font-size="10pt" style:text-underline-style="none" officeooo:rsid="00198cec" officeooo:paragraph-rsid="00198cec" style:font-size-asian="10pt" style:font-size-complex="10pt"/>
    </style:style>
    <style:style style:name="P21" style:family="paragraph" style:parent-style-name="Standard" style:list-style-name="L1">
      <style:paragraph-properties fo:text-align="start" style:justify-single-word="false"/>
      <style:text-properties fo:color="#333333" style:font-name="Arial" fo:font-size="10pt" fo:font-weight="normal" officeooo:paragraph-rsid="00136b94" style:font-size-asian="10pt" style:font-weight-asian="normal" style:font-size-complex="10pt" style:font-weight-complex="normal"/>
    </style:style>
    <style:style style:name="P22" style:family="paragraph" style:parent-style-name="Standard" style:list-style-name="L2">
      <style:paragraph-properties fo:text-align="start" style:justify-single-word="false"/>
      <style:text-properties fo:color="#333333" style:font-name="Arial" fo:font-size="10pt" fo:font-weight="normal" style:font-size-asian="10pt" style:font-weight-asian="normal" style:font-size-complex="10pt" style:font-weight-complex="normal"/>
    </style:style>
    <style:style style:name="P23" style:family="paragraph" style:parent-style-name="Standard" style:list-style-name="L2">
      <style:paragraph-properties fo:text-align="start" style:justify-single-word="false"/>
      <style:text-properties fo:color="#333333" style:font-name="Arial" fo:font-size="10pt" fo:font-weight="normal" officeooo:paragraph-rsid="00136b94" style:font-size-asian="10pt" style:font-weight-asian="normal" style:font-size-complex="10pt" style:font-weight-complex="normal"/>
    </style:style>
    <style:style style:name="P24" style:family="paragraph" style:parent-style-name="Standard" style:list-style-name="L3">
      <style:paragraph-properties fo:text-align="start" style:justify-single-word="false"/>
      <style:text-properties fo:color="#333333" style:font-name="Arial" fo:font-size="10pt" fo:font-weight="normal" style:font-size-asian="10pt" style:font-weight-asian="normal" style:font-size-complex="10pt" style:font-weight-complex="normal"/>
    </style:style>
    <style:style style:name="P25" style:family="paragraph" style:parent-style-name="Standard" style:list-style-name="L3">
      <style:paragraph-properties fo:text-align="start" style:justify-single-word="false"/>
      <style:text-properties fo:color="#333333" style:font-name="Arial" fo:font-size="10pt" fo:font-weight="normal" officeooo:paragraph-rsid="0016b8b7" style:font-size-asian="10pt" style:font-weight-asian="normal" style:font-size-complex="10pt" style:font-weight-complex="normal"/>
    </style:style>
    <style:style style:name="P26" style:family="paragraph" style:parent-style-name="Standard" style:list-style-name="L1">
      <style:paragraph-properties fo:text-align="start" style:justify-single-word="false"/>
      <style:text-properties fo:font-size="10pt" fo:font-weight="normal" style:font-size-asian="10pt" style:font-weight-asian="normal" style:font-size-complex="10pt" style:font-weight-complex="normal"/>
    </style:style>
    <style:style style:name="P27" style:family="paragraph" style:parent-style-name="Standard" style:list-style-name="L1">
      <style:paragraph-properties fo:text-align="start" style:justify-single-word="false"/>
      <style:text-properties fo:font-size="10pt" fo:font-weight="normal" officeooo:paragraph-rsid="00136b94" style:font-size-asian="10pt" style:font-weight-asian="normal" style:font-size-complex="10pt" style:font-weight-complex="normal"/>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333333" style:font-name="Arial" fo:font-size="10pt" style:text-underline-style="none" fo:font-weight="bold" officeooo:rsid="00198cec" officeooo:paragraph-rsid="00198cec" style:font-size-asian="10pt" style:font-weight-asian="bold" style:font-size-complex="10pt"/>
    </style:style>
    <style:style style:name="P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333333" style:font-name="Arial" fo:font-size="10pt" style:text-underline-style="none" fo:font-weight="bold" officeooo:rsid="00198cec" officeooo:paragraph-rsid="00229035" style:font-size-asian="10pt" style:font-weight-asian="bold" style:font-size-complex="10pt"/>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333333" style:font-name="Arial" fo:font-size="10pt" style:text-underline-style="none" fo:font-weight="bold" officeooo:rsid="00229035" officeooo:paragraph-rsid="00229035" style:font-size-asian="10pt" style:font-weight-asian="bold" style:font-size-complex="10pt"/>
    </style:style>
    <style:style style:name="T1" style:family="text">
      <style:text-properties fo:color="#333333" style:font-name="Arial"/>
    </style:style>
    <style:style style:name="T2" style:family="text">
      <style:text-properties fo:color="#333333" style:font-name="Arial" fo:font-size="12pt" fo:font-weight="bold" style:font-size-asian="12pt" style:font-weight-asian="bold" style:font-size-complex="12pt"/>
    </style:style>
    <style:style style:name="T3" style:family="text">
      <style:text-properties fo:color="#333333" style:font-name="Arial" fo:font-size="12pt" style:text-underline-style="solid" style:text-underline-width="auto" style:text-underline-color="font-color" fo:font-weight="bold" style:font-size-asian="12pt" style:font-weight-asian="bold" style:font-size-complex="12pt"/>
    </style:style>
    <style:style style:name="T4" style:family="text">
      <style:text-properties fo:color="#333333" style:font-name="Arial" fo:font-weight="bold" style:font-weight-asian="bold"/>
    </style:style>
    <style:style style:name="T5" style:family="text">
      <style:text-properties fo:color="#333333" style:font-name="Arial" fo:font-weight="bold" officeooo:rsid="001332d0" style:font-weight-asian="bold"/>
    </style:style>
    <style:style style:name="T6" style:family="text">
      <style:text-properties fo:color="#333333" style:font-name="Arial" fo:font-weight="bold" officeooo:rsid="00136b94" style:font-weight-asian="bold"/>
    </style:style>
    <style:style style:name="T7" style:family="text">
      <style:text-properties fo:color="#333333" style:font-name="Arial" fo:font-weight="bold" officeooo:rsid="0016b8b7" style:font-weight-asian="bold"/>
    </style:style>
    <style:style style:name="T8" style:family="text">
      <style:text-properties fo:color="#333333" style:font-name="Arial" fo:font-weight="bold" officeooo:rsid="0018ede6" style:font-weight-asian="bold"/>
    </style:style>
    <style:style style:name="T9" style:family="text">
      <style:text-properties fo:color="#333333" style:font-name="Arial" fo:font-weight="normal" style:font-weight-asian="normal" style:font-weight-complex="normal"/>
    </style:style>
    <style:style style:name="T10" style:family="text">
      <style:text-properties fo:color="#333333" style:font-name="Arial" fo:font-weight="normal" officeooo:rsid="001332d0" style:font-weight-asian="normal" style:font-weight-complex="normal"/>
    </style:style>
    <style:style style:name="T11" style:family="text">
      <style:text-properties fo:color="#333333" style:font-name="Arial" fo:font-weight="normal" officeooo:rsid="00136b94" style:font-weight-asian="normal" style:font-weight-complex="normal"/>
    </style:style>
    <style:style style:name="T12" style:family="text">
      <style:text-properties fo:color="#333333" style:font-name="Arial" fo:font-weight="normal" officeooo:rsid="0014cc20" style:font-weight-asian="normal" style:font-weight-complex="normal"/>
    </style:style>
    <style:style style:name="T13" style:family="text">
      <style:text-properties fo:color="#333333" style:font-name="Arial" fo:font-weight="normal" officeooo:rsid="0016b8b7" style:font-weight-asian="normal" style:font-weight-complex="normal"/>
    </style:style>
    <style:style style:name="T14" style:family="text">
      <style:text-properties fo:color="#333333" style:font-name="Arial" officeooo:rsid="001332d0"/>
    </style:style>
    <style:style style:name="T15" style:family="text">
      <style:text-properties fo:color="#333333" style:font-name="Arial" officeooo:rsid="00136b94"/>
    </style:style>
    <style:style style:name="T16" style:family="text">
      <style:text-properties fo:color="#333333" style:font-name="Arial" officeooo:rsid="0014cc20"/>
    </style:style>
    <style:style style:name="T17" style:family="text">
      <style:text-properties fo:color="#333333" style:font-name="Arial" officeooo:rsid="0016b8b7"/>
    </style:style>
    <style:style style:name="T18" style:family="text">
      <style:text-properties fo:color="#333333" style:font-name="Arial" officeooo:rsid="001a84d6"/>
    </style:style>
    <style:style style:name="T19" style:family="text">
      <style:text-properties officeooo:rsid="001abc24"/>
    </style:style>
    <style:style style:name="T20" style:family="text">
      <style:text-properties fo:font-style="normal" fo:font-weight="normal" officeooo:rsid="001abc24" style:font-style-asian="normal" style:font-weight-asian="normal" style:font-style-complex="normal" style:font-weight-complex="normal"/>
    </style:style>
    <style:style style:name="T21" style:family="text">
      <style:text-properties officeooo:rsid="001b17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ImageEn Paint Engine </text:span><text:span text:style-name="T4">(Bundle 3.</text:span><text:span text:style-name="T8">2</text:span><text:span text:style-name="T4">)</text:span></text:p>
      <text:p text:style-name="P19">Author: Francesco Savastano</text:p>
      <text:p text:style-name="P28">Email: <text:s/><text:a xlink:type="simple" xlink:href="mailto:nwscomps@gmail.com" text:style-name="Internet_20_link" text:visited-style-name="Visited_20_Internet_20_Link">nwscomps@gmail.com</text:a></text:p>
      <text:p text:style-name="P30">WebSite: <text:a xlink:type="simple" xlink:href="http://fssoft.it/delphicomps.html" text:style-name="Internet_20_link" text:visited-style-name="Visited_20_Internet_20_Link">http://fssoft.it/delphicomps.html</text:a></text:p>
      <text:p text:style-name="P29"/>
      <text:p text:style-name="P17"/>
      <text:p text:style-name="P1"><text:span text:style-name="T3">Class TimageEnPaintEngineManager</text:span><text:span text:style-name="T4"> </text:span></text:p>
      <text:p text:style-name="P5"/>
      <text:p text:style-name="P5">TComponent &lt;-- TImageEnPaintEngineManager</text:p>
      <text:p text:style-name="P5"/>
      <text:p text:style-name="P8">Declared in Unit NWSComps_IEPaintengine_Manager</text:p>
      <text:p text:style-name="P8"/>
      <text:p text:style-name="P8">Description:</text:p>
      <text:p text:style-name="P8"/>
      <text:p text:style-name="P8">This is the user interface class by which the user can configure, start and stop the Paint Engine. It is a visual component that can be placed on a form.</text:p>
      <text:p text:style-name="P5"/>
      <text:p text:style-name="P16">Properties</text:p>
      <text:p text:style-name="P5"/>
      <text:p text:style-name="P5"/>
      <text:p text:style-name="P5"><text:s/>property EditedRect: Trect read-only</text:p>
      <text:p text:style-name="P5"/>
      <text:p text:style-name="P8">Gives the coordinates of the lastly edited area.</text:p>
      <text:p text:style-name="P5"/>
      <text:p text:style-name="P5"><text:s/>property IsRunning: boolean read-only</text:p>
      <text:p text:style-name="P5"/>
      <text:p text:style-name="P8">Checks whether the Paint-engine is running.</text:p>
      <text:p text:style-name="P5"/>
      <text:p text:style-name="P5"><text:s/>property Params_Cloning</text:p>
      <text:p text:style-name="P5"/>
      <text:p text:style-name="P13">Parameters to control the behavior of PE in the Cloning Mode:</text:p>
      <text:p text:style-name="P5"/>
      <text:p text:style-name="P1"><text:span text:style-name="T4"><text:s text:c="3"/></text:span><text:span text:style-name="T9"><text:s/>→</text:span><text:span text:style-name="T10"> </text:span><text:span text:style-name="T9">ShowBrush:boolean → when true the PE will display the shape of the cursor at the clone picture source point </text:span></text:p>
      <text:p text:style-name="P8"/>
      <text:p text:style-name="P2"><text:span text:style-name="T1"><text:s text:c="4"/>→</text:span><text:span text:style-name="T14"> </text:span><text:span text:style-name="T1"><text:s/>SrcImageEn: TimageenView → the source ImageEnView component from which to clone </text:span></text:p>
      <text:p text:style-name="P8"/>
      <text:p text:style-name="P2"><text:span text:style-name="T1"><text:s text:c="4"/>→</text:span><text:span text:style-name="T14"> </text:span><text:span text:style-name="T1"><text:s/>srcPoint:TPoint → the source point </text:span></text:p>
      <text:p text:style-name="P8"/>
      <text:p text:style-name="P2"><text:span text:style-name="T1"><text:s text:c="3"/>→</text:span><text:span text:style-name="T14"> </text:span><text:span text:style-name="T1"><text:s/>tgtPoint:TPoint → the target point </text:span></text:p>
      <text:p text:style-name="P5"/>
      <text:p text:style-name="P5"><text:s/>property Params_Color</text:p>
      <text:p text:style-name="P5"/>
      <text:p text:style-name="P13">Parameters to control the behavior of PE in the Color Mode:</text:p>
      <text:p text:style-name="P5"/>
      <text:p text:style-name="P1"><text:span text:style-name="T4"><text:s text:c="4"/>→</text:span><text:span text:style-name="T5"> </text:span><text:span text:style-name="T9">Color:Tcolor → the color to be used when painting in color mode </text:span></text:p>
      <text:p text:style-name="P5"/>
      <text:p text:style-name="P5"><text:s/>property Params_History</text:p>
      <text:p text:style-name="P5"/>
      <text:p text:style-name="P13">Parameters to control the behavior of PE in the History Mode:</text:p>
      <text:p text:style-name="P5"/>
      <text:p text:style-name="P1"><text:span text:style-name="T4"><text:s text:c="4"/>→</text:span><text:span text:style-name="T5"> </text:span><text:span text:style-name="T9">HistoryBitmap: TIEBitmap → the image that will be restored by painting when the PE is in history mode </text:span></text:p>
      <text:p text:style-name="P5"/>
      <text:p text:style-name="P5"><text:s/>property Params_Paint</text:p>
      <text:p text:style-name="P5"/>
      <text:p text:style-name="P14">Parameters to control the general behavior of PE:</text:p>
      <text:p text:style-name="P8"/>
      <text:p text:style-name="P4"><text:span text:style-name="T1">→</text:span><text:span text:style-name="T15"> </text:span><text:span text:style-name="T1"><text:s/>BlendMode: Tbeblendmode → the current blend mode to be used during painting. </text:span></text:p>
      <text:p text:style-name="P8"/>
      <text:p text:style-name="P2"><text:span text:style-name="T1"><text:s text:c="4"/>→</text:span><text:span text:style-name="T15"> </text:span><text:span text:style-name="T1"><text:s/>BrushBitmap:TIEBitmap → the picture to be used as a brush. If not assigned the standard round brush will be used </text:span></text:p>
      <text:p text:style-name="P8"/>
      <text:p text:style-name="P2"><text:span text:style-name="T1"><text:s text:c="4"/>→</text:span><text:span text:style-name="T15"> </text:span><text:span text:style-name="T1"><text:s/>ContinuousPainting: boolean → when true the PE will never stop painting even if the user does not move the cursor. If false the painting will stop when the user does not change the cursor position. </text:span></text:p>
      <text:p text:style-name="P8"><text:soft-page-break/></text:p>
      <text:p text:style-name="P2"><text:span text:style-name="T1"><text:s text:c="4"/>→</text:span><text:span text:style-name="T15"> </text:span><text:span text:style-name="T1"><text:s/>Dithering:integer (0..100) → the amount of dithering to apply to the default round brush </text:span></text:p>
      <text:p text:style-name="P8"/>
      <text:p text:style-name="P2"><text:span text:style-name="T1"><text:s text:c="4"/>→</text:span><text:span text:style-name="T15"> </text:span><text:span text:style-name="T1"><text:s/>EnableAutoScroll:boolean → When true, while painting if the cursor goes beyond the display rectangle, the PE will scroll the display. </text:span></text:p>
      <text:p text:style-name="P8"/>
      <text:p text:style-name="P2"><text:span text:style-name="T1"><text:s text:c="4"/>→</text:span><text:span text:style-name="T15"> </text:span><text:span text:style-name="T1"><text:s/>EnableEditAlphaChannel:boolean → when true the alpha channel of the current layer will be also edited while painting </text:span></text:p>
      <text:p text:style-name="P8"/>
      <text:p text:style-name="P2"><text:span text:style-name="T1"><text:s text:c="4"/>→</text:span><text:span text:style-name="T15"> </text:span><text:span text:style-name="T1"><text:s/>Feather:integer (0..100) → the amount of smoothing of the default round brush </text:span></text:p>
      <text:p text:style-name="P8"/>
      <text:p text:style-name="P2"><text:span text:style-name="T1"><text:s text:c="4"/>→</text:span><text:span text:style-name="T15"> </text:span><text:span text:style-name="T1"><text:s/>Gradation:integer (0..100) → the gradation of the smoothing of the default round brush </text:span></text:p>
      <text:p text:style-name="P8"/>
      <text:p text:style-name="P2"><text:span text:style-name="T1"><text:s text:c="4"/>→</text:span><text:span text:style-name="T15"> </text:span><text:span text:style-name="T1"><text:s/>LargeSteps: boolean → when true the pe will not draw a line between two consecutive brush positions </text:span></text:p>
      <text:p text:style-name="P8"/>
      <text:p text:style-name="P2"><text:span text:style-name="T1"><text:s text:c="4"/>→</text:span><text:span text:style-name="T15"> </text:span><text:span text:style-name="T1"><text:s/>Mode: tPeMode → the mode of painting. Can be pemColor, pemRetouch, pemHistory, pemClone, pemTexture, pemDeformations, pemEraseLayer, pemRestoreLayer </text:span></text:p>
      <text:p text:style-name="P8"/>
      <text:p text:style-name="P2"><text:span text:style-name="T1"><text:s text:c="4"/>→</text:span><text:span text:style-name="T15"> </text:span><text:span text:style-name="T1"><text:s/>Precision: integer (0..100) → the amount of precision, the higher the more cursor positions will be elaborated. </text:span></text:p>
      <text:p text:style-name="P8"/>
      <text:p text:style-name="P2"><text:span text:style-name="T1"><text:s text:c="4"/>→</text:span><text:span text:style-name="T15"> </text:span><text:span text:style-name="T1"><text:s/>Radius: integer → the radius in pixels of the brush </text:span></text:p>
      <text:p text:style-name="P8"/>
      <text:p text:style-name="P2"><text:span text:style-name="T1"><text:s text:c="4"/>→</text:span><text:span text:style-name="T15"> </text:span><text:span text:style-name="T1"><text:s/>RotateBrush: boolean → when true the PE will rotat</text:span><text:span text:style-name="T15">e</text:span><text:span text:style-name="T1"> the brush according to the angle of movement. </text:span></text:p>
      <text:p text:style-name="P8"/>
      <text:p text:style-name="P2"><text:span text:style-name="T1"><text:s text:c="4"/>→</text:span><text:span text:style-name="T15"> </text:span><text:span text:style-name="T1">Selective: boolean → when true the painting will affect only those parts of the picture whose color matches the color of the region of the picture in which the painting has started </text:span></text:p>
      <text:p text:style-name="P2"><text:span text:style-name="T1"><text:s text:c="4"/>→</text:span><text:span text:style-name="T15"> </text:span><text:span text:style-name="T1"><text:s/>SelTolerance: integer (0..255) → the tolerance for the selectiv</text:span><text:span text:style-name="T15">e painting</text:span><text:span text:style-name="T1"> algorithm </text:span></text:p>
      <text:p text:style-name="P8"/>
      <text:p text:style-name="P2"><text:span text:style-name="T1"><text:s text:c="4"/>→</text:span><text:span text:style-name="T15"> </text:span><text:span text:style-name="T1"><text:s/>SessionMode: tPeSessionMode </text:span></text:p>
      <text:p text:style-name="P8"/>
      <text:list xml:id="list4141245393" text:style-name="L1">
        <text:list-item>
          <text:p text:style-name="P21">sm_IgnoreSessionMemory: in this mode the engine always build up strokes </text:p>
        </text:list-item>
        <text:list-item>
          <text:p text:style-name="P27"><text:span text:style-name="T1">sm_KeepSessionMemory_UntilNext: in this mode during the current painting session strokes are not buil</text:span><text:span text:style-name="T15">t</text:span><text:span text:style-name="T1"> up, but in the next painting session, strokes will be build up on top of the previous painting </text:span></text:p>
        </text:list-item>
        <text:list-item>
          <text:p text:style-name="P26"><text:span text:style-name="T1">sm_KeepSessionMemory_UntilManualReset: in this mode strokes are not buil</text:span><text:span text:style-name="T15">t</text:span><text:span text:style-name="T1"> up until you reset the session manually using the Session_Reset method. </text:span></text:p>
        </text:list-item>
      </text:list>
      <text:p text:style-name="P8"/>
      <text:p text:style-name="P2"><text:span text:style-name="T1"><text:s text:c="4"/>→</text:span><text:span text:style-name="T15"> </text:span><text:span text:style-name="T1"><text:s/>ShowBrushShape: boolean → when true the PE will display the shape of the brush at the cursor </text:span><text:span text:style-name="T15">when painting</text:span></text:p>
      <text:p text:style-name="P2"><text:span text:style-name="T15"><text:s text:c="4"/>→</text:span><text:span text:style-name="T18"> <text:s/>SprayEffect: (0-100) the higher the value the more the brush will simulate a spray effect</text:span></text:p>
      <text:p text:style-name="P8"/>
      <text:p text:style-name="P2"><text:span text:style-name="T1"><text:s text:c="4"/>→</text:span><text:span text:style-name="T15"> </text:span><text:span text:style-name="T1">Step:integer distance in pixels between two consecutive brush strokes. </text:span></text:p>
      <text:p text:style-name="P8"/>
      <text:p text:style-name="P2"><text:span text:style-name="T1"><text:s text:c="4"/>→</text:span><text:span text:style-name="T15"> </text:span><text:span text:style-name="T1"><text:s/>Transparence: integer (0..255) the higher </text:span><text:span text:style-name="T15">it is</text:span><text:span text:style-name="T1"> the less </text:span><text:span text:style-name="T15">pressure</text:span><text:span text:style-name="T1"> will be </text:span><text:span text:style-name="T15">on</text:span><text:span text:style-name="T1"> the painting. Set it to 0 </text:span><text:span text:style-name="T15">paint </text:span><text:span text:style-name="T1">at full </text:span><text:span text:style-name="T15">pressure</text:span><text:span text:style-name="T1">. </text:span></text:p>
      <text:p text:style-name="P5"/>
      <text:p text:style-name="P5"><text:s/>property Params_Retouch</text:p>
      <text:p text:style-name="P5"/>
      <text:p text:style-name="P13">Parameters to control the behavior of PE in the Retouch Mode:</text:p>
      <text:p text:style-name="P5"/>
      <text:p text:style-name="P1"><text:span text:style-name="T4"><text:s text:c="4"/>→</text:span><text:span text:style-name="T6"> </text:span><text:span text:style-name="T9"><text:s/>Amount:integer (0..255) the amount of retouch to be applied </text:span></text:p>
      <text:p text:style-name="P8"/>
      <text:p text:style-name="P2"><text:span text:style-name="T1"><text:s text:c="4"/>→</text:span><text:span text:style-name="T15"> </text:span><text:span text:style-name="T1"><text:s/>Kind: TpeRetouchKind:</text:span></text:p>
      <text:p text:style-name="P8"/>
      <text:list xml:id="list2666010776" text:style-name="L2">
        <text:list-item>
          <text:p text:style-name="P23">rk_blur: blurs the picture by averaging the colors of the painted area </text:p>
        </text:list-item>
        <text:list-item>
          <text:p text:style-name="P23">rk_Sharpen: sharpens the edges of the picture in the painted area </text:p>
        </text:list-item>
        <text:list-item>
          <text:p text:style-name="P23">rk_dodge: brightens (dodge mode) the picture in the painted area </text:p>
        </text:list-item>
        <text:list-item>
          <text:p text:style-name="P23">rk_burn: darkens (burn mode) the picture in the painted area rk_Lighten: brightens the picture in the painted area </text:p>
        </text:list-item>
        <text:list-item>
          <text:p text:style-name="P23">rk_Darken: darkens the picture in the painted area </text:p>
        </text:list-item>
        <text:list-item>
          <text:p text:style-name="P23">rk_Saturate: increases the saturation in the painted area </text:p>
        </text:list-item>
        <text:list-item>
          <text:p text:style-name="P23">rk_Desaturate: decreases the saturation in the painted area </text:p>
        </text:list-item>
        <text:list-item>
          <text:p text:style-name="P22">rk_Custom: use your own custom function to retouch. To define your custom function use the RetouchCustom property </text:p>
        </text:list-item>
      </text:list>
      <text:p text:style-name="P5"/>
      <text:p text:style-name="P1"><text:span text:style-name="T4"><text:s text:c="3"/></text:span><text:span text:style-name="T9"><text:s/>→</text:span><text:span text:style-name="T11"> </text:span><text:span text:style-name="T9"><text:s/>RetouchCustom: TPERetouchCustomFunction = function(const inputBGRA: TbeBGRAbytearray): </text:span><text:soft-page-break/><text:span text:style-name="T9">TbeBGRAbytearray of object; </text:span></text:p>
      <text:p text:style-name="P5"/>
      <text:p text:style-name="P5"><text:s/>property Params_Tablet</text:p>
      <text:p text:style-name="P5"/>
      <text:p text:style-name="P13">Parameters to control the behavior of Graphic Tablet:</text:p>
      <text:p text:style-name="P5"/>
      <text:p text:style-name="P1"><text:span text:style-name="T4"><text:s text:c="4"/></text:span><text:span text:style-name="T9">→</text:span><text:span text:style-name="T12"> </text:span><text:span text:style-name="T9">PressureMode → can be pmLinear or pmUnlinear </text:span></text:p>
      <text:p text:style-name="P5"/>
      <text:p text:style-name="P1"><text:span text:style-name="T4"><text:s text:c="4"/></text:span><text:span text:style-name="T9">→</text:span><text:span text:style-name="T12"> </text:span><text:span text:style-name="T9"><text:s/>PressureSensitive:boolean <text:s/>when true the PE will read the pressure changes from the tablet </text:span></text:p>
      <text:p text:style-name="P8"/>
      <text:p text:style-name="P2"><text:span text:style-name="T1"><text:s text:c="4"/>→</text:span><text:span text:style-name="T16"> </text:span><text:span text:style-name="T1"><text:s/>PressureUnlinearStrength: integer (0..100) <text:s/>the higher the more unlinear the sensitivity to the pressure </text:span></text:p>
      <text:p text:style-name="P8"/>
      <text:p text:style-name="P2"><text:span text:style-name="T1"><text:s text:c="4"/>→</text:span><text:span text:style-name="T16"> </text:span><text:span text:style-name="T1"><text:s/>PressureVar: integer → pressure variation scale. </text:span><text:span text:style-name="T16">This influences the way the amount <text:s/>of pressure is accounted</text:span><text:span text:style-name="T1"> </text:span></text:p>
      <text:p text:style-name="P8"/>
      <text:p text:style-name="P2"><text:span text:style-name="T1"><text:s text:c="4"/>→</text:span><text:span text:style-name="T16"> </text:span><text:span text:style-name="T1"><text:s/>PressureDynamics: you can </text:span><text:span text:style-name="T16">specify</text:span><text:span text:style-name="T1"> dynamics </text:span><text:span text:style-name="T16">to</text:span><text:span text:style-name="T1"> chang</text:span><text:span text:style-name="T16">e either</text:span><text:span text:style-name="T1"> the Opacity </text:span><text:span text:style-name="T16">or</text:span><text:span text:style-name="T1"> the Radius of the brush, </text:span><text:span text:style-name="T16">or both</text:span><text:span text:style-name="T1">, using the tablet pressure sensor. </text:span></text:p>
      <text:p text:style-name="P5"/>
      <text:p text:style-name="P5"><text:s/>property Params_Texture</text:p>
      <text:p text:style-name="P5"/>
      <text:p text:style-name="P13">Parameters to control the behavior of PE in the Texture Mode:</text:p>
      <text:p text:style-name="P5"/>
      <text:p text:style-name="P1"><text:span text:style-name="T4"><text:s text:c="4"/>→</text:span><text:span text:style-name="T7"> </text:span><text:span text:style-name="T9">TextureBitmap: TIEBitmap → the picture to be used as texture </text:span></text:p>
      <text:p text:style-name="P5"/>
      <text:p text:style-name="P5"><text:s/>property Params_Warp</text:p>
      <text:p text:style-name="P5"/>
      <text:p text:style-name="P13">Parameters to control the behavior of PE in the Warp (Deformation) Mode:</text:p>
      <text:p text:style-name="P5"/>
      <text:p text:style-name="P1"><text:span text:style-name="T4"><text:s text:c="4"/></text:span><text:span text:style-name="T9">→</text:span><text:span text:style-name="T13"> </text:span><text:span text:style-name="T9"><text:s/>Amount:integer (0..255) the amount of warp effect to be applied </text:span></text:p>
      <text:p text:style-name="P8"/>
      <text:p text:style-name="P3"><text:span text:style-name="T1"><text:s text:c="4"/>→</text:span><text:span text:style-name="T17"> </text:span><text:span text:style-name="T1"><text:s/>Kind: TpeDeformationKind:</text:span></text:p>
      <text:list xml:id="list1127883394" text:style-name="L3">
        <text:list-item>
          <text:p text:style-name="P25">dk_WhirlCW: whirlpool clockwise </text:p>
        </text:list-item>
        <text:list-item>
          <text:p text:style-name="P25">dk_WhirlACW: whirlpool anticlockwise </text:p>
        </text:list-item>
        <text:list-item>
          <text:p text:style-name="P25">dk_Bulge: bulge effect </text:p>
        </text:list-item>
        <text:list-item>
          <text:p text:style-name="P24">dk_Pinch: pinching effect </text:p>
        </text:list-item>
      </text:list>
      <text:p text:style-name="P8"/>
      <text:p text:style-name="P2"><text:span text:style-name="T1"><text:s text:c="4"/>→</text:span><text:span text:style-name="T17"> </text:span><text:span text:style-name="T1"><text:s/>Step: integer (0..255) <text:s/>The step by which the amount of warp must increase with time </text:span></text:p>
      <text:p text:style-name="P8"/>
      <text:p text:style-name="P2"><text:span text:style-name="T1"><text:s text:c="4"/>→</text:span><text:span text:style-name="T17"> </text:span><text:span text:style-name="T1"><text:s/>StepTime: integer (milliseconds) → the time interval before the amount </text:span><text:span text:style-name="T17">of the effect is increased</text:span></text:p>
      <text:p text:style-name="P5"/>
      <text:p text:style-name="P5"><text:s/>property UpdateMode</text:p>
      <text:p text:style-name="P5"/>
      <text:p text:style-name="P13">Changes the mode of update. The PE can call an imageEn update at each single brush stroke or at the painting of each line. The single brush mode is generally to be preferred, unless you have a picture with a lot of image layers</text:p>
      <text:p text:style-name="P13"/>
      <text:p text:style-name="P13">→<text:span text:style-name="T19"> </text:span><text:span text:style-name="T20">umEachStroke: the update happens at each stroke</text:span></text:p>
      <text:p text:style-name="P15">→ umEachLine: the update happens at each line</text:p>
      <text:p text:style-name="P5"/>
      <text:p text:style-name="P5"><text:s/>property UpdatePriority</text:p>
      <text:p text:style-name="P5"/>
      <text:p text:style-name="P8">Set the priority of updating the display of ImageEn. By default the priority is high.</text:p>
      <text:p text:style-name="P8"/>
      <text:p text:style-name="P8">→<text:span text:style-name="T19"> upHigh: High speed update</text:span></text:p>
      <text:p text:style-name="P8">→<text:span text:style-name="T19"> upMedium: Middle speed update</text:span></text:p>
      <text:p text:style-name="P8">→<text:span text:style-name="T19"> upLow: Low speed update</text:span></text:p>
      <text:p text:style-name="P8"/>
      <text:p text:style-name="P10">With big images you may desire a lower speed of update.</text:p>
      <text:p text:style-name="P5"/>
      <text:p text:style-name="P5"/>
      <text:p text:style-name="P5"/>
      <text:p text:style-name="P5"/>
      <text:p text:style-name="P16">Events</text:p>
      <text:p text:style-name="P5"/>
      <text:p text:style-name="P5"/>
      <text:p text:style-name="P5"><text:soft-page-break/><text:s/>property OnFinishedPainting: TNotifyEvent</text:p>
      <text:p text:style-name="P5"/>
      <text:p text:style-name="P8">Handle this event to perform any duty that must be done after the PE has stopped painting.</text:p>
      <text:p text:style-name="P5"/>
      <text:p text:style-name="P5"><text:s/>property OnPainting: tpeNotifyEvent = procedure(sender: Tobject; var x, y: integer) of object;</text:p>
      <text:p text:style-name="P5"/>
      <text:p text:style-name="P8">Handle this event to perform any duty that must occur while the PE is painting, such as displaying the editing coordinates.</text:p>
      <text:p text:style-name="P5"/>
      <text:p text:style-name="P5"><text:s/>property OnStartedPainting: TNotifyEvent</text:p>
      <text:p text:style-name="P5"/>
      <text:p text:style-name="P8">Handle this event to perform any duty that must be done after the PE has started painting.</text:p>
      <text:p text:style-name="P5"/>
      <text:p text:style-name="P5"><text:s/>property OnSessionEvent: tPeParamsSessionEvent = procedure(ChangedParams: tPeCustomParams; Session: TPeSession) of object;</text:p>
      <text:p text:style-name="P5"/>
      <text:p text:style-name="P8">Only for advanced use. Handle this event to perform any duty that must occur when the state of the painting session has changed</text:p>
      <text:p text:style-name="P5"/>
      <text:p text:style-name="P5"/>
      <text:p text:style-name="P5"/>
      <text:p text:style-name="P16">Methods</text:p>
      <text:p text:style-name="P5"/>
      <text:p text:style-name="P5"/>
      <text:p text:style-name="P5"><text:s/>procedure Session_AddFlag(const theFlagName: string)</text:p>
      <text:p text:style-name="P5"/>
      <text:p text:style-name="P8">For advanced use. You can use flags to attach to the current session some information that you may use to remind you of the status of the session.</text:p>
      <text:p text:style-name="P5"/>
      <text:p text:style-name="P5"><text:s/>procedure Session_RemoveFlag(const theFlagName: string)</text:p>
      <text:p text:style-name="P5"/>
      <text:p text:style-name="P8">For advanced use. Removes a flag previously added</text:p>
      <text:p text:style-name="P5"/>
      <text:p text:style-name="P5"><text:s/>procedure Session_Reset</text:p>
      <text:p text:style-name="P5"/>
      <text:p text:style-name="P8">Resets the memory of the current painting session manually. This is useful only if you use the advanced session mode: sm_KeepSessionMemory_UntilManualReset</text:p>
      <text:p text:style-name="P8">Most users will not need this mode.</text:p>
      <text:p text:style-name="P5"/>
      <text:p text:style-name="P5"><text:s/>procedure Init(theImageEn: TImageenview; theMode: tpemode);</text:p>
      <text:p text:style-name="P5"/>
      <text:p text:style-name="P8">Initializes the PE by specifying on which TimageEnView the painting should occur and the mode of painting.</text:p>
      <text:p text:style-name="P8"/>
      <text:p text:style-name="P6">StartCursorNoPaint(theimageen: TImageenview; radius: cardinal);</text:p>
      <text:p text:style-name="P6"/>
      <text:p text:style-name="P9">Call this method to show the cursor even when painting <text:span text:style-name="T21">has not started </text:span>on the specified ImageenView. When you change the radius, you have to call this method <text:span text:style-name="T21">again</text:span>, to reflect the current radius.</text:p>
      <text:p text:style-name="P5"/>
      <text:p text:style-name="P5"><text:s/>procedure StartPainting overload</text:p>
      <text:p text:style-name="P5"/>
      <text:p text:style-name="P8">Commands the PE to start painting. After this command the PE will set itself into running mode and will trigger the StartedPainting Event.</text:p>
      <text:p text:style-name="P5"/>
      <text:p text:style-name="P5"><text:s/>procedure StartPainting(ForceNewSession: boolean); overload</text:p>
      <text:p text:style-name="P5"/>
      <text:p text:style-name="P8">Commands the PE to start painting and specifies whether a new session should be enforced (which is equivalent to call the Session_Reset method). After this command the PE set itself into running mode and will trigger the StartedPainting Event.</text:p>
      <text:p text:style-name="P8"/>
      <text:p text:style-name="P7">procedure StopCur<text:span text:style-name="T21">s</text:span>orNoPaint</text:p>
      <text:p text:style-name="P7"/>
      <text:p text:style-name="P9">Call this to stop the display of the cursor on the attached Imagenenview, when not yet painting. <text:span text:style-name="T21">It is good practice to call it also on the destroy event of the form.</text:span></text:p>
      <text:p text:style-name="P5"/>
      <text:p text:style-name="P5"><text:soft-page-break/><text:s/>procedure StopPainting</text:p>
      <text:p text:style-name="P5"/>
      <text:p text:style-name="P8">Commands the PE to stop painting. After this command the PE will finalize the running mode and will trigger the FinishedPainting Event.</text:p>
      <text:p text:style-name="P8"/>
      <text:p text:style-name="P18"/>
      <text:p text:style-name="P12"/>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color="#000080" style:font-name="Arial" fo:font-family="Arial" style:font-family-generic="roman" style:font-pitch="variable" fo:font-size="12pt" style:text-underline-style="solid" style:text-underline-width="auto" style:text-underline-color="font-color"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80"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ListLabel_20_4" style:display-name="ListLabel 4" style:family="text">
      <style:text-properties fo:color="#333333" style:font-name="Arial" fo:font-family="Arial" style:font-family-generic="roman" style:font-pitch="variable" fo:font-size="12pt" style:text-underline-style="solid" style:text-underline-width="auto" style:text-underline-color="font-color" fo:font-weight="normal" style:font-size-asian="12pt" style:font-weight-asian="normal"/>
    </style:style>
    <style:style style:name="ListLabel_20_5" style:display-name="ListLabel 5" style:family="text">
      <style:text-properties fo:color="#000080" style:font-name="Arial" fo:font-family="Arial" style:font-family-generic="roman" style:font-pitch="variable" fo:font-size="11.5pt" style:text-underline-style="solid" style:text-underline-width="auto" style:text-underline-color="font-color" style:font-size-asian="11.5pt"/>
    </style:style>
    <style:style style:name="ListLabel_20_6" style:display-name="ListLabel 6" style:family="text">
      <style:text-properties fo:color="#333333" style:font-name="Arial" fo:font-family="Arial" style:font-family-generic="roman" style:font-pitch="variable" fo:font-size="11.5pt" style:text-underline-style="solid" style:text-underline-width="auto" style:text-underline-color="font-color" style:font-size-asian="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01cm" fo:margin-bottom="1.536cm" fo:margin-left="1.27cm" fo:margin-right="1.482cm" style:writing-mode="lr-tb" style:layout-grid-color="#c0c0c0" style:layout-grid-lines="2606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72cm" fo:margin-bottom="1.76cm" fo:margin-left="1.552cm" fo:margin-right="1.446cm" style:writing-mode="lr-tb" style:layout-grid-color="#c0c0c0" style:layout-grid-lines="2656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37cm" fo:margin-bottom="1.709cm" fo:margin-left="1.27cm" fo:margin-right="1.623cm" style:writing-mode="lr-tb" style:layout-grid-color="#c0c0c0" style:layout-grid-lines="266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37cm" fo:margin-bottom="2.54cm" fo:margin-left="1.27cm" fo:margin-right="1.411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3T14:47:04.939000000</dc:date>
    <meta:editing-duration>PT1H9M4S</meta:editing-duration>
    <meta:editing-cycles>18</meta:editing-cycles>
    <meta:generator>LibreOffice/6.0.3.2$Windows_X86_64 LibreOffice_project/8f48d515416608e3a835360314dac7e47fd0b821</meta:generator>
    <meta:document-statistic meta:table-count="0" meta:image-count="0" meta:object-count="0" meta:page-count="5" meta:paragraph-count="123" meta:word-count="1412" meta:character-count="9296" meta:non-whitespace-character-count="7761"/>
  </office:meta>
</office:document-meta>
</file>